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3BF055E95693A8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ira Sans3" svg:font-family="'Fira Sans'" style:font-family-generic="swiss" style:font-pitch="variable"/>
    <style:font-face style:name="Fira Sans4" svg:font-family="'Fira Sans'" style:font-adornments="Έντονα" style:font-family-generic="swiss" style:font-pitch="variable"/>
    <style:font-face style:name="Fira Sans2" svg:font-family="'Fira Sans'" style:font-adornments="Ημιέντονα"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d1bea2"/>
    </style:style>
    <style:style style:name="P9" style:family="paragraph" style:parent-style-name="Text_20_body">
      <style:paragraph-properties fo:margin-top="0cm" fo:margin-bottom="0cm" loext:contextual-spacing="false" fo:line-height="100%"/>
      <style:text-properties officeooo:rsid="002cd046" officeooo:paragraph-rsid="00f519e9"/>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Text_20_body">
      <style:text-properties officeooo:paragraph-rsid="00f71428"/>
    </style:style>
    <style:style style:name="P42" style:family="paragraph" style:parent-style-name="Heading_20_1">
      <style:text-properties officeooo:paragraph-rsid="002aef87"/>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paragraph-rsid="0061705b"/>
    </style:style>
    <style:style style:name="P46" style:family="paragraph" style:parent-style-name="Heading_20_4">
      <style:paragraph-properties fo:break-before="page"/>
    </style:style>
    <style:style style:name="P47" style:family="paragraph" style:parent-style-name="Heading_20_4">
      <style:paragraph-properties fo:break-before="page"/>
      <style:text-properties officeooo:paragraph-rsid="00b8406f"/>
    </style:style>
    <style:style style:name="P4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9" style:family="paragraph" style:parent-style-name="Text_20_body">
      <style:paragraph-properties fo:padding="0.074cm" fo:border-left="none" fo:border-right="none" fo:border-top="none" fo:border-bottom="0.06pt solid #000000" style:join-border="false"/>
      <style:text-properties officeooo:rsid="00d84889"/>
    </style:style>
    <style:style style:name="P50"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0pt" style:font-size-asian="8.75pt" style:font-name-complex="Arial2" style:font-size-complex="10pt"/>
    </style:style>
    <style:style style:name="P51" style:family="paragraph" style:parent-style-name="Table_20_Contents">
      <style:paragraph-properties fo:text-align="center" style:justify-single-word="false"/>
      <style:text-properties officeooo:rsid="00e53d17" officeooo:paragraph-rsid="00e53d17"/>
    </style:style>
    <style:style style:name="P52" style:family="paragraph" style:parent-style-name="Heading_20_1" style:master-page-name="Standard">
      <style:paragraph-properties style:page-number="auto"/>
      <style:text-properties officeooo:paragraph-rsid="00e2dd6b"/>
    </style:style>
    <style:style style:name="P53" style:family="paragraph" style:parent-style-name="Text_20_body" style:list-style-name="L1"/>
    <style:style style:name="P54" style:family="paragraph" style:parent-style-name="Text_20_body" style:list-style-name="L1">
      <style:text-properties officeooo:paragraph-rsid="00f71428"/>
    </style:style>
    <style:style style:name="P55" style:family="paragraph" style:parent-style-name="Text_20_body" style:list-style-name="L1">
      <style:text-properties fo:font-weight="bold" officeooo:rsid="002c28f8" officeooo:paragraph-rsid="00f71428" fo:background-color="transparent" style:font-weight-asian="bold" style:font-weight-complex="bold"/>
    </style:style>
    <style:style style:name="P56"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f7dcee" style:language-asian="el" style:country-asian="GR"/>
    </style:style>
    <style:style style:name="T13" style:family="text">
      <style:text-properties officeooo:rsid="00f71428" style:language-asian="el" style:country-asian="GR"/>
    </style:style>
    <style:style style:name="T14" style:family="text">
      <style:text-properties officeooo:rsid="003ff3e1"/>
    </style:style>
    <style:style style:name="T15" style:family="text">
      <style:text-properties officeooo:rsid="0045a3d9"/>
    </style:style>
    <style:style style:name="T16" style:family="text">
      <style:text-properties officeooo:rsid="0046a949"/>
    </style:style>
    <style:style style:name="T17" style:family="text">
      <style:text-properties fo:background-color="#00ffff" loext:char-shading-value="0"/>
    </style:style>
    <style:style style:name="T18"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9"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0" style:family="text">
      <style:text-properties officeooo:rsid="005f83c2"/>
    </style:style>
    <style:style style:name="T21" style:family="text">
      <style:text-properties officeooo:rsid="006be3b4"/>
    </style:style>
    <style:style style:name="T22" style:family="text">
      <style:text-properties officeooo:rsid="0087a9af"/>
    </style:style>
    <style:style style:name="T23" style:family="text">
      <style:text-properties officeooo:rsid="0091da7c"/>
    </style:style>
    <style:style style:name="T24" style:family="text">
      <style:text-properties officeooo:rsid="009b1347"/>
    </style:style>
    <style:style style:name="T25" style:family="text">
      <style:text-properties officeooo:rsid="00a0b41d"/>
    </style:style>
    <style:style style:name="T26" style:family="text">
      <style:text-properties officeooo:rsid="00a5263c"/>
    </style:style>
    <style:style style:name="T27" style:family="text">
      <style:text-properties officeooo:rsid="00a88067"/>
    </style:style>
    <style:style style:name="T28" style:family="text">
      <style:text-properties fo:font-style="normal" style:font-style-asian="normal" style:font-style-complex="normal"/>
    </style:style>
    <style:style style:name="T29" style:family="text">
      <style:text-properties fo:font-style="normal" officeooo:rsid="00a88067" style:font-style-asian="normal" style:font-style-complex="normal"/>
    </style:style>
    <style:style style:name="T30" style:family="text">
      <style:text-properties officeooo:rsid="00a90787"/>
    </style:style>
    <style:style style:name="T31" style:family="text">
      <style:text-properties officeooo:rsid="00aac232"/>
    </style:style>
    <style:style style:name="T32" style:family="text">
      <style:text-properties officeooo:rsid="00ab81fd"/>
    </style:style>
    <style:style style:name="T33" style:family="text">
      <style:text-properties officeooo:rsid="00b8406f"/>
    </style:style>
    <style:style style:name="T34" style:family="text">
      <style:text-properties officeooo:rsid="00b85083"/>
    </style:style>
    <style:style style:name="T35" style:family="text">
      <style:text-properties officeooo:rsid="00bdef11"/>
    </style:style>
    <style:style style:name="T36" style:family="text">
      <style:text-properties officeooo:rsid="00c432ab"/>
    </style:style>
    <style:style style:name="T37" style:family="text">
      <style:text-properties officeooo:rsid="00c49de6"/>
    </style:style>
    <style:style style:name="T38" style:family="text">
      <style:text-properties officeooo:rsid="00c4c4d8"/>
    </style:style>
    <style:style style:name="T39" style:family="text">
      <style:text-properties officeooo:rsid="00c823ec"/>
    </style:style>
    <style:style style:name="T40" style:family="text">
      <style:text-properties officeooo:rsid="00e21330"/>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df59aa" style:font-weight-asian="normal" style:font-weight-complex="normal"/>
    </style:style>
    <style:style style:name="T44" style:family="text">
      <style:text-properties fo:font-weight="normal" officeooo:rsid="00eac694" style:font-weight-asian="normal" style:font-weight-complex="normal"/>
    </style:style>
    <style:style style:name="T45" style:family="text">
      <style:text-properties fo:font-size="14pt" style:font-size-asian="14pt" style:font-size-complex="14pt"/>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4pt" fo:font-weight="normal" style:font-size-asian="14pt" style:font-weight-asian="normal" style:font-size-complex="14pt" style:font-weight-complex="normal" style:text-rotation-angle="90" style:text-rotation-scale="line-height"/>
    </style:style>
    <style:style style:name="T48" style:family="text">
      <style:text-properties style:font-name="Fira Sans"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T49" style:family="text">
      <style:text-properties style:font-name="Fira Sans" fo:font-size="10pt" fo:font-weight="normal" officeooo:rsid="00f71428" style:font-name-asian="Times New Roman1" style:font-size-asian="10pt" style:language-asian="ar" style:country-asian="SA" style:font-weight-asian="bold" style:font-name-complex="Tahoma1" style:font-size-complex="12pt" style:font-weight-complex="bold"/>
    </style:style>
    <style:style style:name="T50" style:family="text">
      <style:text-properties officeooo:rsid="00ea01a9" fo:background-color="#ffffff" loext:char-shading-value="0"/>
    </style:style>
    <style:style style:name="T51" style:family="text">
      <style:text-properties officeooo:rsid="00e2d41b" fo:background-color="#ffffff" loext:char-shading-value="0"/>
    </style:style>
    <style:style style:name="T52" style:family="text">
      <style:text-properties officeooo:rsid="00f71428"/>
    </style:style>
    <style:style style:name="T53" style:family="text">
      <style:text-properties officeooo:rsid="00f94341"/>
    </style:style>
    <style:style style:name="T54" style:family="text">
      <style:text-properties style:font-name="Fira Sans3"/>
    </style:style>
    <style:style style:name="T55" style:family="text">
      <style:text-properties style:font-name="Fira Sans3" fo:font-weight="bold" style:font-weight-asian="bold" style:font-weight-complex="bold"/>
    </style:style>
    <style:style style:name="T56" style:family="text">
      <style:text-properties style:font-name="Fira Sans3" fo:font-weight="normal" style:font-weight-asian="normal" style:font-weight-complex="normal"/>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3BF055E95693A8A2.png" xlink:type="simple" xlink:show="embed" xlink:actuate="onLoad" loext:mime-type="image/png"/>
      </draw:frame>
      <text:h text:style-name="P52" text:outline-level="1">Εβδομαδιαία Έκθεση</text:h>
      <text:h text:style-name="Heading_20_1" text:outline-level="1">Επιδημιολογικής Επιτήρησης της Γρίπης</text:h>
      <text:h text:style-name="P42" text:outline-level="1"><text:span text:style-name="T1"><text:s/>E</text:span>βδομάδα \Sexpr{rb$wklab}</text:h>
      <text:p text:style-name="P50"/>
      <table:table table:name="Table1" table:style-name="Table1">
        <table:table-column table:style-name="Table1.A" table:number-columns-repeated="2"/>
        <table:table-row table:style-name="Table1.1">
          <table:table-cell table:style-name="Table1.A1" office:value-type="string">
            <text:p text:style-name="P51"><text:span text:style-name="T54">Δραστηριότητα: </text:span><text:span text:style-name="T55">χαμηλή</text:span><text:span text:style-name="T56"> </text:span><text:span text:style-name="T46">⇊↓↑⇈</text:span><text:span text:style-name="T47">⇶</text:span></text:p>
          </table:table-cell>
          <table:table-cell table:style-name="Table1.A1" office:value-type="string">
            <text:p text:style-name="P51"><text:span text:style-name="T54">Τάση: </text:span><text:span text:style-name="T55">σταθερή</text:span> <text:span text:style-name="T45">→↗↘</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719505188" text:style-name="L1"><text:list-item><text:p text:style-name="P53">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text:p></text:list-item><text:list-item><text:p text:style-name="P54">Κατά την εβδομάδα \Sexpr{rb$wklab} στα <text:span text:style-name="T12">δύο </text:span><text:span text:style-name="T9">Εθνικά Εργαστήρια Αναφοράς Γρίπης (Τμήμα Ιολογίας, Ελληνικό Ινστιτούτο Παστέρ, και Β' 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3">Από την εβδομάδα 40/\Sexpr{tgtyear} έως και την εβδομάδα \Sexpr{rb$wklab} καταγράφηκαν \Sexpr{nrow(rb$meth) + nrow(rb$outOfMeth)} σοβαρά κρούσματα εργαστηριακά επιβεβαιωμένης γρίπης. <text:span text:style-name="T40">Από αυτά,</text:span>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text:p></text:list-item><text:list-item><text:p text:style-name="P55">Με βάση τα ανωτέρω, η δραστηριότητα της γρίπης στην Ελλάδα <text:span text:style-name="T17">συνεχίζει να παρουσιάζει ανοδική τάση. </text:span><text:span text:style-name="T50">Το</text:span><text:span text:style-name="T51">νίζεται η σημασία του αντιγριπικού εμβολιασμού ως ο καλύτερος τρόπος προφύλαξης από τη γρίπη.</text:span></text:p></text:list-item></text:list></draw:text-box></draw:frame><text:soft-page-break/></text:p>
      <text:p text:style-name="P46">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 και <text:span text:style-name="T52">2</text:span>).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4">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2">gsub(",", ".", as.character(4.5*2800/1680), fixed=TRUE)</text:span></text:p>
      <text:p text:style-name="P10">imgDefs$args &lt;- list(res=288)</text:p>
      <text:p text:style-name="P11">setImageDefs(imgDefs)</text:p>
      <text:p text:style-name="P7"/>
      <text:p text:style-name="P20">par(family=”Fira Sans”)</text:p>
      <text:p text:style-name="P9">sentinel_graph(ytp, col=c("navyblue","red3"), lty=c(3,1), lwd=c(1,1.5), </text:p>
      <text:p text:style-name="P9"><text:s text:c="6"/>ci=ciInPlot, <text:span text:style-name="T30">alpha=c(0.08,0.15), ygrid=NA, thresholds=thresholds,</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5">1</text:span>1). <text:span text:style-name="T27">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5">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7">Διάγραμμα <text:span text:style-name="T33">2</text:span>: Εκτίμηση αριθμού κρουσμάτων γριπώδους συνδρομής ανά 1.000 επισκέψεις, κατά εβδομάδα, <text:span text:style-name="T33">ανά ηλικιακή ομάδα</text:span>. Σύνολο χώρας, περίοδοι γρίπης: <text:s/>\Sexpr{paste(sapply(-1:0, function(i)paste(i+tgtyear,i+tgtyear+1,sep="-")), collapse=", ")}.</text:p>
      <text:p text:style-name="P29">&lt;&lt;diag<text:span text:style-name="T33">2</text:span>, echo = FALSE, fig = TRUE, results = <text:span text:style-name="T14">xml</text:span>&gt;&gt;=</text:p>
      <text:p text:style-name="P14">imgDefs &lt;- getImageDefs()</text:p>
      <text:p text:style-name="P14">imgDefs$plotHeight &lt;- 1680*<text:span text:style-name="T35">1.7</text:span></text:p>
      <text:p text:style-name="P14">imgDefs$plotWidth &lt;- 2800</text:p>
      <text:p text:style-name="P14">imgDefs$dispHeight &lt;- “<text:span text:style-name="T35">7.65</text:span>”</text:p>
      <text:p text:style-name="P14">imgDefs$dispWidth &lt;- <text:span text:style-name="T22">gsub(",", ".", as.character(7.65*2800/(1680*1.7)), fixed=TRUE)</text:span></text:p>
      <text:p text:style-name="P14">imgDefs$args &lt;- list(res=288)</text:p>
      <text:p text:style-name="P14">setImageDefs(imgDefs)</text:p>
      <text:p text:style-name="P21"/>
      <text:p text:style-name="P21">par(family=”Fira Sans”, <text:span text:style-name="T34">mfrow</text:span>=<text:span text:style-name="T34">c(4,1)</text:span>)</text:p>
      <text:p text:style-name="P25">sentinel_graph(ytp, "resGri1", col=c("navyblue","red3"), lty=c(3,1), lwd=c(1,1.5), ci=ciInPlot, alpha=c(0.08,0.15), <text:span text:style-name="T36">ylab=NA</text:span>)</text:p>
      <text:p text:style-name="P25">mtext("Ηλικίες 0-4 ετών", side=3, cex=1.1)</text:p>
      <text:p text:style-name="P26">sentinel_graph(ytp, "resGri2", col=c("navyblue","red3"), lty=c(3,1), lwd=c(1,1.5), ci=ciInPlot, alpha=c(0.08,0.15), <text:span text:style-name="T36">ylab=NA</text:span>)</text:p>
      <text:p text:style-name="P25">mtext("Ηλικίες 5-14 ετών", side=3, cex=1.1)</text:p>
      <text:p text:style-name="P26">sentinel_graph(ytp, "resGri3", col=c("navyblue","red3"), lty=c(3,1), lwd=c(1,1.5), ci=ciInPlot, alpha=c(0.08,0.15), <text:span text:style-name="T36">ylab=NA</text:span>)</text:p>
      <text:p text:style-name="P25">mtext("Ηλικίες 15-64 ετών", side=3, cex=1.1)</text:p>
      <text:p text:style-name="P26">sentinel_graph(ytp, "resGri4", col=c("navyblue","red3"), lty=c(3,1), lwd=c(1,1.5), ci=ciInPlot, alpha=c(0.08,0.15), <text:span text:style-name="T36">ylab=NA</text:span>)</text:p>
      <text:p text:style-name="P25">mtext("Ηλικίες &gt;=65 ετών", side=3, cex=1.1)</text:p>
      <text:p text:style-name="P27">mtext("Κρ<text:span text:style-name="T39">ούσματα</text:span> γριπώδους συνδρομής ανά 1000 επισκέψεις", side=2, outer=TRUE, line=-1.<text:span text:style-name="T37">3</text:span>, cex=1.<text:span text:style-name="T38">1</text:span>)</text:p>
      <text:p text:style-name="P29">@</text:p>
      <text:p text:style-name="P38"/>
      <text:p text:style-name="P44">Πηγή των πληροφοριών για το κλινικό σκέλος επιδημιολογικής επιτήρησης</text:p>
      <text:p text:style-name="Text_20_body">Τα στοιχεία τ<text:span text:style-name="T40">ων</text:span> διαγρ<text:span text:style-name="T40">α</text:span>μμ<text:span text:style-name="T40">ά</text:span>τ<text:span text:style-name="T40">ων</text:span> 1 <text:span text:style-name="T40">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4">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2">Ως εκ τούτου, επισημαίνουμε ότι λόγω αλλαγών στις λειτουργικές παραμέτρους του Συστήματος </text:span><text:span text:style-name="T7">Sentinel</text:span><text:span text:style-name="T42"> στο πλαίσιο του εκσυγχρονισμού του από την περίοδο 2014-2015, τα δεδομένα του δικτύου δεν θεωρούνται </text:span><text:span text:style-name="T43">άμεσα </text:span><text:span text:style-name="T42">συγκρίσιμα με αυτά των παρελθόντων ετών. </text:span></text:p>
      <text:p text:style-name="P40"><text:span text:style-name="T42">Με βάση τα αποτελέσματα του συστήματος sentinel, και λαμβάνοντας υπόψη και τ</text:span><text:span text:style-name="T44">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3">Β. Εργαστηριακό σκέλος επιδημιολογικής επιτήρησης της γρίπης</text:p>
      <text:p text:style-name="Text_20_body"><text:span text:style-name="T9">Κατά την εβδομάδα \Sexpr{rb$wklab}</text:span> <text:span text:style-name="T9">στα δύο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3">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3">3</text:span>, echo = FALSE, <text:span text:style-name="T15">fig=TRUE, </text:span>results = <text:span text:style-name="T16">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2">gsub(",", ".", as.character(4.5*2800/1680), fixed=TRUE)</text:span></text:p>
      <text:p text:style-name="P15">imgDefs$args &lt;- list(res=288)</text:p>
      <text:p text:style-name="P15">setImageDefs(imgDefs)</text:p>
      <text:p text:style-name="P8"/>
      <text:p text:style-name="P35">par(family=”Fira Sans”)</text:p>
      <text:p text:style-name="P32">swabPlot()</text:p>
      <text:p text:style-name="Text_20_body">@</text:p>
      <text:p text:style-name="Text_20_body"/>
      <text:p text:style-name="P43">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3">4</text:span>). </text:p>
      <text:p text:style-name="Text_20_body"><text:span text:style-name="T9">Όσον αφορά στα </text:span><text:span text:style-name="T18">κρούσματα με νοσηλεία σε Μ.Ε.Θ.</text:span><text:span text:style-name="T19">:</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text:span text:style-name="T49">θέντα</text:span>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P41">Τα \Sexpr{rb$showPct(sum(rb$meth$HRCG, na.rm=TRUE), nrow(rb$meth))} από τα \Sexpr{nrow(rb$meth)} προαναφερθέντ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text:span text:style-name="T53">Υπουργείου Υγείας</text:span>, και εξ'αυτών εμβολιασμένοι ήταν οι \Sexpr{rb$showPct(sum(rb$meth$HRCG &amp; rb$meth$vacc, na.rm=TRUE), sum(rb$meth$HRCG, na.rm=TRUE))}.</text:p>
      <text:p text:style-name="Text_20_body"><text:span text:style-name="T9">Όσον αφορά στα </text:span><text:span text:style-name="T18">κρούσματα χωρίς νοσηλεία σε Μ.Ε.Θ.</text:span><text:span text:style-name="T19">:</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θέντ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text:span><text:soft-page-break/><text:span text:style-name="T9">τα \Sexpr{rb$showPct(sum(rb$outOfMeth$flutypef=="A(H1N1)pdm09", na.rm=T), sum(rb$outOfMeth$flutypef %in% c("A(H1N1)pdm09", "A(H3N2)"), na.rm=T))} στον υπότυπο Α(Η1Ν1)pdm09. Τα \Sexpr{rb$showPct(sum(rb$outOfMeth$HRCG, na.rm=TRUE), nrow(rb$outOfMeth))} από τα \Sexpr{nrow(rb$outOfMeth)} προαναφερθέντ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text:span><text:span text:style-name="T13">5</text:span><text:span text:style-name="T9">).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θέντ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8"/>
      <text:p text:style-name="Text_20_body"/>
      <text:p text:style-name="P46"><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3">4</text:span>, echo = FALSE, fig=TRUE, results = hide&gt;&gt;=</text:p>
      <text:p text:style-name="P2">imgDefs &lt;- getImageDefs()</text:p>
      <text:p text:style-name="P2">imgDefs$plotHeight &lt;- 1<text:span text:style-name="T21">3</text:span>00</text:p>
      <text:p text:style-name="P2">imgDefs$plotWidth &lt;- 2800</text:p>
      <text:p text:style-name="P4">imgDefs$dispHeight &lt;- <text:span text:style-name="T22">gsub(",", ".", as.character(7.5*13/28), fixed=TRUE)</text:span></text:p>
      <text:p text:style-name="P2">imgDefs$dispWidth &lt;- “7.5”</text:p>
      <text:p text:style-name="P2">imgDefs$args &lt;- list(res=288)</text:p>
      <text:p text:style-name="P3">setImageDefs(imgDefs)</text:p>
      <text:p text:style-name="P24">par(mar=c(3.5,4,1,2), <text:span text:style-name="T26">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3">6</text:span>, echo = FALSE, fig=TRUE, results = hide&gt;&gt;=</text:p>
      <text:p text:style-name="P24">par(mar=c(3.5,4,1,2), <text:span text:style-name="T26">family="Fira Sans"</text:span>)</text:p>
      <text:p text:style-name="P2">deathPlot()</text:p>
      <text:p text:style-name="P2">@</text:p>
      <text:p text:style-name="P46"><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20">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2">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3">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3">7</text:span>).</text:p>
      <text:p text:style-name="Text_20_body"/>
      <text:p text:style-name="Heading_20_4">Διάγραμμα <text:span text:style-name="T33">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1">13</text:span> έως εβδομάδα \Sexpr{strsplit(rb$wklab," ")[[1]][1]}.</text:p>
      <text:p text:style-name="P5">&lt;&lt;diag<text:span text:style-name="T33">7</text:span>, echo = FALSE, fig=TRUE, results = hide&gt;&gt;=</text:p>
      <text:p text:style-name="P23">par(family=”Fira Sans”)</text:p>
      <text:p text:style-name="P5"><text:span text:style-name="T23">momo</text:span>Plot()</text:p>
      <text:p text:style-name="P5">@</text:p>
      <text:p text:style-name="Text_20_body"/>
      <text:p text:style-name="Λεζάντα1">Σημειώσεις: </text:p>
      <text:list xml:id="list999321913" text:style-name="WWNum3">
        <text:list-item>
          <text:p text:style-name="P56">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5">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7">των</text:span> δήμων της χώρας σε σχεδόν πραγματικό χρόνο και αφορά τους θανάτους που <text:span text:style-name="T27">δηλώθηκαν</text:span> κατά την εβδομάδα αναφοράς.</text:p>
      <text:p text:style-name="P36">Τα δεδομένα <text:span text:style-name="T27">αφορούν το </text:span><text:span text:style-name="T29">σύνολο της χώρας, και </text:span><text:span text:style-name="T28">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8">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8">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2">Κ</text:span>ατά την εβδομάδα \Sexpr{rb$wklab}, <text:span text:style-name="T32">ΧΧ χώρες ανέφεραν χαμηλή δραστηριότητα της γρίπης.</text:span></text:p>
      <text:p text:style-name="Text_20_body"/>
      <text:p text:style-name="P49"/>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ira Sans3" svg:font-family="'Fira Sans'" style:font-family-generic="swiss" style:font-pitch="variable"/>
    <style:font-face style:name="Fira Sans4" svg:font-family="'Fira Sans'" style:font-adornments="Έντονα" style:font-family-generic="swiss" style:font-pitch="variable"/>
    <style:font-face style:name="Fira Sans2" svg:font-family="'Fira Sans'" style:font-adornments="Ημιέντονα"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ira Sans4" fo:font-family="'Fira 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ira Sans2" fo:font-family="'Fira Sans'" style:font-style-name="Ημιέντον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4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1</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4</meta:editing-cycles>
    <meta:print-date>2015-01-02T12:36:00</meta:print-date>
    <meta:creation-date>2015-01-22T07:51:00</meta:creation-date>
    <dc:date>2019-12-27T11:47:03.934694769</dc:date>
    <meta:editing-duration>PT14H9M21S</meta:editing-duration>
    <meta:generator>LibreOffice/6.4.0.1$Linux_X86_64 LibreOffice_project/40$Build-1</meta:generator>
    <dc:creator>Theodore Lytras</dc:creator>
    <meta:document-statistic meta:table-count="2" meta:image-count="1" meta:object-count="0" meta:page-count="13" meta:paragraph-count="133" meta:word-count="2318" meta:character-count="21409" meta:non-whitespace-character-count="18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