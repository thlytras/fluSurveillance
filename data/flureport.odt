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081771239942A5EF.png" manifest:media-type="image/png"/>
  <manifest:file-entry manifest:full-path="Pictures/10000000000003A60000007D2C9BC97F6E769A5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officeooo:paragraph-rsid="0086067c"/>
    </style:style>
    <style:style style:name="P5" style:family="paragraph" style:parent-style-name="Text_20_body">
      <style:paragraph-properties fo:margin-top="0cm" fo:margin-bottom="0cm" loext:contextual-spacing="false" fo:line-height="100%"/>
      <style:text-properties officeooo:paragraph-rsid="0087a9af"/>
    </style:style>
    <style:style style:name="P6" style:family="paragraph" style:parent-style-name="Text_20_body">
      <style:paragraph-properties fo:margin-top="0cm" fo:margin-bottom="0cm" loext:contextual-spacing="false" fo:line-height="100%"/>
      <style:text-properties officeooo:paragraph-rsid="0091da7c"/>
    </style:style>
    <style:style style:name="P7" style:family="paragraph" style:parent-style-name="Text_20_body">
      <style:paragraph-properties fo:margin-top="0cm" fo:margin-bottom="0cm" loext:contextual-spacing="false" fo:line-height="100%"/>
      <style:text-properties officeooo:rsid="006aab8c" officeooo:paragraph-rsid="006aab8c"/>
    </style:style>
    <style:style style:name="P8" style:family="paragraph" style:parent-style-name="Text_20_body">
      <style:paragraph-properties fo:margin-top="0cm" fo:margin-bottom="0cm" loext:contextual-spacing="false" fo:line-height="100%"/>
      <style:text-properties officeooo:rsid="002cd046" officeooo:paragraph-rsid="002cd046"/>
    </style:style>
    <style:style style:name="P9" style:family="paragraph" style:parent-style-name="Text_20_body">
      <style:paragraph-properties fo:margin-top="0cm" fo:margin-bottom="0cm" loext:contextual-spacing="false" fo:line-height="100%"/>
      <style:text-properties officeooo:rsid="007b5304" officeooo:paragraph-rsid="007b5304"/>
    </style:style>
    <style:style style:name="P10" style:family="paragraph" style:parent-style-name="Text_20_body">
      <style:paragraph-properties fo:margin-top="0cm" fo:margin-bottom="0cm" loext:contextual-spacing="false" fo:line-height="100%"/>
      <style:text-properties officeooo:rsid="007b5304" officeooo:paragraph-rsid="0085843e"/>
    </style:style>
    <style:style style:name="P11" style:family="paragraph" style:parent-style-name="Text_20_body">
      <style:paragraph-properties fo:margin-top="0cm" fo:margin-bottom="0cm" loext:contextual-spacing="false" fo:line-height="100%"/>
      <style:text-properties officeooo:rsid="007b5304" officeooo:paragraph-rsid="00864224"/>
    </style:style>
    <style:style style:name="P12" style:family="paragraph" style:parent-style-name="Text_20_body">
      <style:paragraph-properties fo:margin-top="0cm" fo:margin-bottom="0cm" loext:contextual-spacing="false" fo:line-height="100%"/>
      <style:text-properties officeooo:rsid="007b5304" officeooo:paragraph-rsid="0087a9af"/>
    </style:style>
    <style:style style:name="P13" style:family="paragraph" style:parent-style-name="Text_20_body">
      <style:paragraph-properties fo:margin-top="0cm" fo:margin-bottom="0cm" loext:contextual-spacing="false" fo:line-height="100%"/>
      <style:text-properties officeooo:rsid="006713ba" officeooo:paragraph-rsid="006713ba"/>
    </style:style>
    <style:style style:name="P14" style:family="paragraph" style:parent-style-name="Text_20_body">
      <style:paragraph-properties fo:margin-top="0cm" fo:margin-bottom="0cm" loext:contextual-spacing="false" fo:line-height="100%"/>
      <style:text-properties officeooo:rsid="006713ba" officeooo:paragraph-rsid="0086067c"/>
    </style:style>
    <style:style style:name="P15" style:family="paragraph" style:parent-style-name="Text_20_body">
      <style:paragraph-properties fo:margin-top="0cm" fo:margin-bottom="0cm" loext:contextual-spacing="false" fo:line-height="100%"/>
      <style:text-properties officeooo:rsid="006713ba" officeooo:paragraph-rsid="0087a9af"/>
    </style:style>
    <style:style style:name="P16" style:family="paragraph" style:parent-style-name="Text_20_body">
      <style:paragraph-properties fo:margin-top="0cm" fo:margin-bottom="0cm" loext:contextual-spacing="false" fo:line-height="100%"/>
      <style:text-properties officeooo:rsid="0062d7e6" officeooo:paragraph-rsid="0068a71b"/>
    </style:style>
    <style:style style:name="P17"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18" style:family="paragraph" style:parent-style-name="Text_20_body">
      <style:text-properties officeooo:rsid="002cd046" officeooo:paragraph-rsid="002cd046"/>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5f83c2" officeooo:paragraph-rsid="005f83c2" style:font-weight-asian="bold" style:font-weight-complex="bold"/>
    </style:style>
    <style:style style:name="P21" style:family="paragraph" style:parent-style-name="Text_20_body">
      <style:text-properties officeooo:paragraph-rsid="002cd046"/>
    </style:style>
    <style:style style:name="P22" style:family="paragraph" style:parent-style-name="Text_20_body">
      <style:text-properties officeooo:rsid="00440472" officeooo:paragraph-rsid="00440472"/>
    </style:style>
    <style:style style:name="P23" style:family="paragraph" style:parent-style-name="Text_20_body">
      <style:text-properties fo:font-size="6pt" style:font-size-asian="5.25pt" style:font-size-complex="6pt"/>
    </style:style>
    <style:style style:name="P24" style:family="paragraph" style:parent-style-name="Text_20_body">
      <style:text-properties officeooo:rsid="005f83c2" officeooo:paragraph-rsid="005f83c2"/>
    </style:style>
    <style:style style:name="P25" style:family="paragraph" style:parent-style-name="Text_20_body">
      <style:text-properties officeooo:paragraph-rsid="005f83c2"/>
    </style:style>
    <style:style style:name="P26" style:family="paragraph" style:parent-style-name="Text_20_body">
      <style:text-properties style:language-asian="el" style:country-asian="GR"/>
    </style:style>
    <style:style style:name="P27" style:family="paragraph" style:parent-style-name="Text_20_body">
      <style:text-properties fo:background-color="#00ffff"/>
    </style:style>
    <style:style style:name="P28" style:family="paragraph" style:parent-style-name="Text_20_body">
      <style:text-properties officeooo:rsid="005f83c2" officeooo:paragraph-rsid="005f83c2" fo:background-color="#00ffff"/>
    </style:style>
    <style:style style:name="P29" style:family="paragraph" style:parent-style-name="Text_20_body">
      <style:text-properties fo:font-weight="normal" style:font-weight-asian="normal" style:font-weight-complex="normal"/>
    </style:style>
    <style:style style:name="P30" style:family="paragraph" style:parent-style-name="Heading_20_1">
      <style:text-properties officeooo:paragraph-rsid="002aef87"/>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officeooo:paragraph-rsid="0061705b"/>
    </style:style>
    <style:style style:name="P34" style:family="paragraph" style:parent-style-name="Heading_20_4">
      <style:paragraph-properties fo:break-before="page"/>
    </style:style>
    <style:style style:name="P35" style:family="paragraph" style:parent-style-name="Heading_20_4">
      <style:text-properties officeooo:paragraph-rsid="005c172c"/>
    </style:style>
    <style:style style:name="P36" style:family="paragraph" style:parent-style-name="Text_20_body" style:list-style-name="L1"/>
    <style:style style:name="P37" style:family="paragraph" style:parent-style-name="Text_20_body" style:list-style-name="L1">
      <style:text-properties fo:font-weight="bold" officeooo:rsid="002c28f8" officeooo:paragraph-rsid="002c28f8" fo:background-color="transparent" style:font-weight-asian="bold" style:font-weight-complex="bold"/>
    </style:style>
    <style:style style:name="P38" style:family="paragraph" style:parent-style-name="Text_20_body">
      <style:paragraph-properties fo:margin-top="0cm" fo:margin-bottom="0cm" loext:contextual-spacing="false"/>
    </style:style>
    <style:style style:name="P39" style:family="paragraph" style:parent-style-name="Heading_20_1" style:master-page-name="Standard">
      <style:paragraph-properties style:page-number="auto"/>
    </style:style>
    <style:style style:name="P40" style:family="paragraph" style:parent-style-name="Λεζάντα1" style:list-style-name="WWNum3"/>
    <style:style style:name="P41" style:family="paragraph" style:parent-style-name="Λεζάντα1">
      <style:paragraph-properties fo:text-align="justify" style:justify-single-word="false"/>
      <style:text-properties officeooo:paragraph-rsid="009a2348"/>
    </style:style>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92fad3"/>
    </style:style>
    <style:style style:name="T4" style:family="text">
      <style:text-properties fo:font-size="12pt" fo:font-weight="bold" style:font-size-asian="12pt" style:font-weight-asian="bold" style:font-size-complex="12pt"/>
    </style:style>
    <style:style style:name="T5" style:family="text">
      <style:text-properties style:font-name="Arial1" fo:font-size="8pt" fo:font-style="italic" style:font-name-asian="Times New Roman1" style:font-size-asian="8pt" style:font-style-asian="italic" style:font-name-complex="Arial2" style:font-size-complex="8pt"/>
    </style:style>
    <style:style style:name="T6" style:family="text">
      <style:text-properties style:font-name="Arial1" fo:font-size="8pt" fo:font-style="italic" officeooo:rsid="009a2348" style:font-name-asian="Times New Roman1" style:font-size-asian="8pt" style:font-style-asian="italic" style:font-name-complex="Arial2" style:font-size-complex="8pt"/>
    </style:style>
    <style:style style:name="T7" style:family="text">
      <style:text-properties style:font-name="Arial1" fo:font-size="8pt" style:font-name-asian="Times New Roman1" style:font-size-asian="8pt" style:font-name-complex="Arial2" style:font-size-complex="8pt"/>
    </style:style>
    <style:style style:name="T8" style:family="text">
      <style:text-properties style:font-name="Arial1" fo:font-size="8pt" officeooo:rsid="00b211de" style:font-name-asian="Times New Roman1" style:font-size-asian="8pt" style:font-name-complex="Arial2" style:font-size-complex="8pt"/>
    </style:style>
    <style:style style:name="T9" style:family="text">
      <style:text-properties style:font-name="Arial1" fo:font-size="8pt" officeooo:rsid="00b37e26" style:font-name-asian="Times New Roman1" style:font-size-asian="8pt" style:font-name-complex="Arial2" style:font-size-complex="8pt"/>
    </style:style>
    <style:style style:name="T10" style:family="text">
      <style:text-properties style:font-name="Arial1" fo:font-size="8pt" officeooo:rsid="009b1347" style:font-name-asian="Times New Roman1" style:font-size-asian="8pt" style:font-name-complex="Arial2" style:font-size-complex="8pt"/>
    </style:style>
    <style:style style:name="T11" style:family="text">
      <style:text-properties style:font-name="Arial1" fo:font-size="8pt" fo:language="en" fo:country="US" style:font-name-asian="Times New Roman1" style:font-size-asian="8pt" style:font-name-complex="Arial2" style:font-size-complex="8pt"/>
    </style:style>
    <style:style style:name="T12" style:family="text">
      <style:text-properties style:font-name="Arial1" fo:font-size="8pt" fo:language="en" fo:country="US" fo:font-style="italic" officeooo:rsid="00ca6640" style:font-name-asian="Times New Roman1" style:font-size-asian="8pt" style:font-style-asian="italic" style:font-name-complex="Arial2" style:font-size-complex="8pt"/>
    </style:style>
    <style:style style:name="T13" style:family="text">
      <style:text-properties style:font-name="Arial1" fo:font-size="8pt" fo:language="en" fo:country="US" fo:font-weight="normal" style:font-name-asian="Times New Roman1" style:font-size-asian="8pt" style:font-weight-asian="normal" style:font-name-complex="Arial2" style:font-size-complex="8pt" style:font-weight-complex="normal"/>
    </style:style>
    <style:style style:name="T14" style:family="text">
      <style:text-properties style:font-name="Arial1" fo:font-size="8pt" fo:font-weight="normal" style:font-name-asian="Times New Roman1" style:font-size-asian="8pt" style:font-weight-asian="normal" style:font-name-complex="Arial2" style:font-size-complex="8pt" style:font-weight-complex="normal"/>
    </style:style>
    <style:style style:name="T15" style:family="text">
      <style:text-properties style:font-name="Arial1" fo:font-size="8pt" fo:font-weight="normal" officeooo:rsid="00993459" style:font-name-asian="Times New Roman1" style:font-size-asian="8pt" style:font-weight-asian="normal" style:font-name-complex="Arial2" style:font-size-complex="8pt" style:font-weight-complex="normal"/>
    </style:style>
    <style:style style:name="T16" style:family="text">
      <style:text-properties style:font-name="Arial1" fo:font-size="8pt" fo:font-weight="normal" officeooo:rsid="009b1347" style:font-name-asian="Times New Roman1" style:font-size-asian="8pt" style:font-weight-asian="normal" style:font-name-complex="Arial2" style:font-size-complex="8pt" style:font-weight-complex="normal"/>
    </style:style>
    <style:style style:name="T17" style:family="text">
      <style:text-properties style:language-asian="el" style:country-asian="GR"/>
    </style:style>
    <style:style style:name="T18" style:family="text">
      <style:text-properties officeooo:rsid="009b8b24" style:language-asian="el" style:country-asian="GR"/>
    </style:style>
    <style:style style:name="T19" style:family="text">
      <style:text-properties officeooo:rsid="003ff3e1"/>
    </style:style>
    <style:style style:name="T20" style:family="text">
      <style:text-properties officeooo:rsid="0045a3d9"/>
    </style:style>
    <style:style style:name="T21" style:family="text">
      <style:text-properties officeooo:rsid="0046a949"/>
    </style:style>
    <style:style style:name="T22" style:family="text">
      <style:text-properties fo:background-color="#00ffff" loext:char-shading-value="0"/>
    </style:style>
    <style:style style:name="T23" style:family="text">
      <style:text-properties fo:background-color="#00ffff" loext:char-shading-value="0" style:language-asian="el" style:country-asian="GR"/>
    </style:style>
    <style:style style:name="T24"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25" style:family="text">
      <style:text-properties fo:font-style="italic" style:text-underline-style="none" fo:font-weight="bold" style:language-asian="el" style:country-asian="GR" style:font-style-asian="italic" style:font-weight-asian="bold" style:font-style-complex="italic" style:font-weight-complex="bold"/>
    </style:style>
    <style:style style:name="T26" style:family="text">
      <style:text-properties officeooo:rsid="005c172c"/>
    </style:style>
    <style:style style:name="T27" style:family="text">
      <style:text-properties officeooo:rsid="005f83c2"/>
    </style:style>
    <style:style style:name="T28" style:family="text">
      <style:text-properties officeooo:rsid="006be3b4"/>
    </style:style>
    <style:style style:name="T29" style:family="text">
      <style:text-properties officeooo:rsid="0087a9af"/>
    </style:style>
    <style:style style:name="T30" style:family="text">
      <style:text-properties officeooo:rsid="0091da7c"/>
    </style:style>
    <style:style style:name="T31" style:family="text">
      <style:text-properties officeooo:rsid="0092fad3"/>
    </style:style>
    <style:style style:name="T32" style:family="text">
      <style:text-properties officeooo:rsid="009b1347"/>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6">
        <draw:image xlink:href="Pictures/100002010000008D0000006F081771239942A5EF.png" xlink:type="simple" xlink:show="embed" xlink:actuate="onLoad"/>
      </draw:frame>
      <text:h text:style-name="P39" text:outline-level="1">Εβδομαδιαία Έκθεση</text:h>
      <text:h text:style-name="Heading_20_1" text:outline-level="1">Επιδημιολογικής Επιτήρησης της Γρίπης</text:h>
      <text:h text:style-name="P30"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3"><draw:frame draw:style-name="fr2" draw:name="Πλαίσιο2" text:anchor-type="paragraph" svg:width="18.999cm" draw:z-index="27"><draw:text-box fo:min-height="0.755cm"><text:list xml:id="list3110584953617819448" text:style-name="L1"><text:list-item><text:p text:style-name="P36">Κατά την εβδομάδα \Sexpr{rb$wklab} οι επισκέψεις σε ιατρό για γριπώδη συνδρομή <text:span text:style-name="T22">παρουσιάζουν περαιτέρω αύξηση</text:span> σε σύγκριση με την προηγούμενη εβδομάδα \Sexpr{paste(tgtweek %% 100 - 1, tgtweek %/%100, sep="/")} (Διάγραμμα 1).</text:p></text:list-item><text:list-item><text:p text:style-name="P36">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6">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36">Από την εβδομάδα 40/\Sexpr{tgtyear} μέχρι και την <text:span text:style-name="T22">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37">Με βάση τα ανωτέρω, η δραστηριότητα της γρίπης στην Ελλάδα <text:span text:style-name="T22">συνεχίζει να παρουσιάζει ανοδική τάση.</text:span></text:p></text:list-item></text:list></draw:text-box></draw:frame><text:soft-page-break/></text:p>
      <text:p text:style-name="P31">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22">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18">&lt;&lt;diag1, echo = FALSE, fig = TRUE, results = <text:span text:style-name="T19">xml</text:span>&gt;&gt;=</text:p>
      <text:p text:style-name="P11">imgDefs &lt;- getImageDefs()</text:p>
      <text:p text:style-name="P9">imgDefs$plotHeight &lt;- 1680</text:p>
      <text:p text:style-name="P9">imgDefs$plotWidth &lt;- 2800</text:p>
      <text:p text:style-name="P9">imgDefs$dispHeight &lt;- “4.5”</text:p>
      <text:p text:style-name="P12">imgDefs$dispWidth &lt;- <text:span text:style-name="T29">gsub(",", ".", as.character(4.5*2800/1680), fixed=TRUE)</text:span></text:p>
      <text:p text:style-name="P9">imgDefs$args &lt;- list(res=288)</text:p>
      <text:p text:style-name="P10">setImageDefs(imgDefs)</text:p>
      <text:p text:style-name="P8"/>
      <text:p text:style-name="P8">sentinel_graph(ytp, col=c("navyblue","red3"), lty=c(3,1), lwd=c(1,1.5), ci=ciInPlot,</text:p>
      <text:p text:style-name="P8"><text:s text:c="6"/>ylab="Κρούσματα γριπώδους συνδρομής ανά 1000 επισκέψεις")</text:p>
      <text:p text:style-name="P18">@</text:p>
      <text:p text:style-name="P21"/>
      <text:p text:style-name="P41"><text:span text:style-name="T5">Σημείωση 1:</text:span><text:span text:style-name="T7"> <text:s text:c="2"/><text:tab/></text:span><text:span text:style-name="T8">Στο ανωτέρω διάγραμμα απεικονίζονται μόνο δύο περί</text:span><text:span text:style-name="T10">ο</text:span><text:span text:style-name="T8">δοι γρίπης </text:span><text:span text:style-name="T9">και συγκεκριμένα </text:span><text:span text:style-name="T8">η περσινή περί</text:span><text:span text:style-name="T10">ο</text:span><text:span text:style-name="T8">δος 2014-2015 και η φετινή περίοδος 201</text:span><text:span text:style-name="T10">5</text:span><text:span text:style-name="T8">-2016, διότι </text:span><text:span text:style-name="T14">λόγω αλλαγών στις λειτουργικές παραμέτρους του </text:span><text:span text:style-name="T16">σ</text:span><text:span text:style-name="T14">υστήματος </text:span><text:span text:style-name="T13">Sentinel</text:span><text:span text:style-name="T14"> στο πλαίσιο του εκσυγχρονισμού του από την περίοδο 2014-2015, τα δεδομένα του δικτύου δεν θεωρούνται συγκρίσιμα με αυτά των παρελθόντων ετών, </text:span><text:span text:style-name="T15">παρά μόνο με αυτά της προηγούμενης περιόδου 2014-2015.</text:span></text:p>
      <text:p text:style-name="P41"><text:span text:style-name="T5">Σημείωση </text:span><text:span text:style-name="T12">2</text:span><text:span text:style-name="T5">: <text:tab/></text:span><text:span text:style-name="T7">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5">Σημείωση </text:span><text:span text:style-name="T6">3</text:span><text:span text:style-name="T5">: <text:s/><text:tab/></text:span><text:span text:style-name="T7">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11">Sentinel</text:span><text:span text:style-name="T7"> και μετά την έκδοση της παρούσας έκθεσης. </text:span></text:p>
      <text:p text:style-name="P32">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32">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text:span></text:p>
      <text:p text:style-name="P29">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17"> </text:span>ο αριθμός των συμμετεχόντων ιατρών που απέστειλε κλινικά δεδομένα ανήλθε στους \Sexpr{sum(aggr3[as.character(tgtweek),5:6], na.rm=TRUE)}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1">Β. Εργαστηριακό σκέλος επιδημιολογικής επιτήρησης της γρίπης</text:p>
      <text:p text:style-name="Text_20_body"><text:span text:style-name="T17">Κατά την εβδομάδα \Sexpr{rb$wklab}</text:span> <text:span text:style-name="T17">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20">fig=TRUE, </text:span>results = <text:span text:style-name="T21">hide</text:span>&gt;&gt;=</text:p>
      <text:p text:style-name="P22">swabPlot()</text:p>
      <text:p text:style-name="Text_20_body">@</text:p>
      <text:p text:style-name="Text_20_body"/>
      <text:p text:style-name="P31">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17">Όσον αφορά στα </text:span><text:span text:style-name="T24">κρούσματα με νοσηλεία σε Μ.Ε.Θ.</text:span><text:span text:style-name="T25">:</text:span><text:span text:style-name="T17">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26">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p>
      <text:p text:style-name="Text_20_body"><text:span text:style-name="T17">Όσον αφορά στα </text:span><text:span text:style-name="T24">κρούσματα χωρίς νοσηλεία σε Μ.Ε.Θ.</text:span><text:span text:style-name="T25">:</text:span><text:span text:style-name="T17">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text:span><text:soft-page-break/><text:span text:style-name="T17">αυτών τα \Sexpr{rb$showPct(sum(rb$outOfMeth$flutypef=="A(H3N2)", na.rm=T), sum(rb$outOfMeth$flutypef %in% c("A(H1N1)pdm09", "A(H3N2)"), na.rm=T))} ανήκαν στον υπότυπο 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text:span text:style-name="T17">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17">. Από τα \Sexpr{rb$showPct(sum(rb$totDeaths$flutypef %in% c("A(H3N2)", "A(H1N1)pdm09", "A"), na.rm=TRUE), nrow(rb$totDeaths))} κρούσματα απομονώθηκε ιός γρίπης τύπου Α, από το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A"), na.rm=TRUE))} ανήκαν στον υπότυπο Α </text:span>(Η1Ν1)<text:span text:style-name="T1">pdm</text:span>09<text:span text:style-name="T17"> και \Sexpr{rb$showPct(sum(rb$totDeaths$flutypef=="A(H3N2)", na.rm=TRUE), sum(rb$totDeaths$flutypef %in% c("A(H3N2)", "A(H1N1)pdm09", "A"),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
      <text:p text:style-name="P35"><text:soft-page-break/>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26">\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as.Date(meth$ICUadmDate)+1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as.Date(rb$meth$Έξοδος.ΜΕΘ)+1 &lt;= isoweekStart(tgtweek)+6, na.rm=TRUE)}</text:p>
          </table:table-cell>
        </table:table-row>
        <table:table-row table:style-name="Πίνακας1.1">
          <table:table-cell table:style-name="Πίνακας1.A3" office:value-type="string">
            <text:p text:style-name="P19">Σύνολο νοσηλευθέντων σε Μ.Ε.Θ. έως \Sexpr{format(isoweekStart(tgtweek)+6,format="%d/%m/%Y")}</text:p>
          </table:table-cell>
          <table:table-cell table:style-name="Πίνακας1.B3" office:value-type="string">
            <text:p text:style-name="P19">\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as.Date(rb$totDeaths$deathdate)+1 == isoweekStart(tgtweek)+6, na.rm=TRUE)}</text:p>
          </table:table-cell>
        </table:table-row>
        <table:table-row table:style-name="Πίνακας1.1">
          <table:table-cell table:style-name="Πίνακας1.A3" office:value-type="string">
            <text:p text:style-name="P19">Συνολικός αριθμός θανάτων έως \Sexpr{format(isoweekStart(tgtweek)+6,format="%d/%m/%Y")}</text:p>
          </table:table-cell>
          <table:table-cell table:style-name="Πίνακας1.B3" office:value-type="string">
            <text:p text:style-name="P19">\Sexpr{nrow(rb$totDeaths)}</text:p>
          </table:table-cell>
        </table:table-row>
      </table:table>
      <text:p text:style-name="P17"/>
      <text:p text:style-name="Text_20_body"/>
      <text:p text:style-name="Text_20_body"/>
      <text:p text:style-name="Text_20_body"/>
      <text:p text:style-name="Heading_20_4">Πίνακας 2: <text:tab/>Περιστατικά με νοσηλεία σε Μ.Ε.Θ και θάνατοι από εργαστηριακά επιβεβαιωμένη γρίπη. Σύνολο Ελλάδας, από εβδομάδα 40/2014 έως και <text:span text:style-name="T23">Πέμπτη \Sexpr{formatDate(isoweekStart(tgtweek)+10)}</text:span><text:span text:style-name="T17">,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P28">\Sexpr{sum(as.Date(meth$ICUadmDate)+1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P24">\Sexpr{nrow(meth) - sum(as.Date(meth$Έξοδος.ΜΕΘ)+1 &lt;= isoweekStart(tgtweek)+10, na.rm=TRUE)}</text:p>
          </table:table-cell>
        </table:table-row>
        <table:table-row table:style-name="Πίνακας2.1">
          <table:table-cell table:style-name="Πίνακας2.A3" office:value-type="string">
            <text:p text:style-name="P19">Σύνολο νοσηλευθέντων σε Μ.Ε.Θ. έως \Sexpr{format(isoweekStart(tgtweek)+10,format="%d/%m/%Y")}</text:p>
          </table:table-cell>
          <table:table-cell table:style-name="Πίνακας2.B3" office:value-type="string">
            <text:p text:style-name="P20">\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as.Date(totDeaths$deathdate)+1 == isoweekStart(tgtweek)+10, na.rm=TRUE)}</text:p>
          </table:table-cell>
        </table:table-row>
        <table:table-row table:style-name="Πίνακας2.1">
          <table:table-cell table:style-name="Πίνακας2.A3" office:value-type="string">
            <text:p text:style-name="P19">Συνολικός αριθμός θανάτων έως \Sexpr{format(isoweekStart(tgtweek)+10,format="%d/%m/%Y")}</text:p>
          </table:table-cell>
          <table:table-cell table:style-name="Πίνακας2.B3" office:value-type="string">
            <text:p text:style-name="P20">\Sexpr{nrow(totDeaths)}</text:p>
          </table:table-cell>
        </table:table-row>
      </table:table>
      <text:p text:style-name="Text_20_body"/>
      <text:p text:style-name="Heading_20_4"/>
      <text:p text:style-name="P34"><text:span text:style-name="T17">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3">&lt;&lt;diag3, echo = FALSE, fig=TRUE, results = hide&gt;&gt;=</text:p>
      <text:p text:style-name="P3">imgDefs &lt;- getImageDefs()</text:p>
      <text:p text:style-name="P3">imgDefs$plotHeight &lt;- 1<text:span text:style-name="T28">3</text:span>00</text:p>
      <text:p text:style-name="P3">imgDefs$plotWidth &lt;- 2800</text:p>
      <text:p text:style-name="P5">imgDefs$dispHeight &lt;- <text:span text:style-name="T29">gsub(",", ".", as.character(7.5*13/28), fixed=TRUE)</text:span></text:p>
      <text:p text:style-name="P3">imgDefs$dispWidth &lt;- “7.5”</text:p>
      <text:p text:style-name="P3">imgDefs$args &lt;- list(res=288)</text:p>
      <text:p text:style-name="P4">setImageDefs(imgDefs)</text:p>
      <text:p text:style-name="P7">par(mar=c(3.5,4,1,2))</text:p>
      <text:p text:style-name="P3">methPlot()</text:p>
      <text:p text:style-name="P3">@</text:p>
      <text:p text:style-name="P3"/>
      <text:p text:style-name="Heading_20_4"><text:span text:style-name="T17">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3">&lt;&lt;diag4, echo = FALSE, fig=TRUE, results = hide&gt;&gt;=</text:p>
      <text:p text:style-name="P7">par(mar=c(3.5,4,1,2))</text:p>
      <text:p text:style-name="P3">deathPlot()</text:p>
      <text:p text:style-name="P3">@</text:p>
      <text:p text:style-name="P34"><text:span text:style-name="T17">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5">&lt;&lt;diag<text:span text:style-name="T27">5</text:span>, echo = FALSE, fig=TRUE, results = hide&gt;&gt;=</text:p>
      <text:p text:style-name="P13">imgDefs &lt;- getImageDefs()</text:p>
      <text:p text:style-name="P13">imgDefs$plotHeight &lt;- 1680</text:p>
      <text:p text:style-name="P13">imgDefs$plotWidth &lt;- 2800</text:p>
      <text:p text:style-name="P13">imgDefs$dispHeight &lt;- “4.5”</text:p>
      <text:p text:style-name="P15">imgDefs$dispWidth &lt;- <text:span text:style-name="T29">gsub(",", ".", as.character(4.5*2800/1680), fixed=TRUE)</text:span></text:p>
      <text:p text:style-name="P13">imgDefs$args &lt;- list(res=288)</text:p>
      <text:p text:style-name="P14">setImageDefs(imgDefs)</text:p>
      <text:p text:style-name="P16">methDeathAgePlot()</text:p>
      <text:p text:style-name="P25">@</text:p>
      <text:p text:style-name="Text_20_body"/>
      <text:p text:style-name="P31">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0">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text:span text:style-name="T3">0</text:span>/200<text:span text:style-name="T31">9</text:span> έως εβδομάδα \Sexpr{strsplit(rb$wklab," ")[[1]][1]}.</text:p>
      <text:p text:style-name="P6">&lt;&lt;diag<text:span text:style-name="T30">6</text:span>, echo = FALSE, fig=TRUE, results = hide&gt;&gt;=</text:p>
      <text:p text:style-name="P6"><text:span text:style-name="T30">momo</text:span>Plot()</text:p>
      <text:p text:style-name="P6">@</text:p>
      <text:p text:style-name="Text_20_body"/>
      <text:p text:style-name="Λεζάντα1">Σημειώσεις: </text:p>
      <text:list xml:id="list7430656428206677004" text:style-name="WWNum3">
        <text:list-item>
          <text:p text:style-name="P40">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40">Τα δεδομένα της εβδομάδας \Sexpr{strsplit(rb$wklab," ")[[1]][1]} αφορούν τους Δήμους Αθηναίων, Κερατσινίου και Πειραιά, καθώς και τις Περιφερειακές Ενότητες Μαγνησίας και Σποράδων, Αχαΐας, Καβάλας και Κέρκυρας.</text:p>
        </text:list-item>
      </text:list>
      <text:p text:style-name="Text_20_body"/>
      <text:p text:style-name="P33">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
      <text:p text:style-name="Heading_20_2"/>
      <text:p text:style-name="P31">Δ. Η δραστηριότητα της γρίπης στην Ευρώπη</text:p>
      <text:p text:style-name="Text_20_body">Παρατίθενται κατωτέρω τα δεδομένα για την δραστηριότητα της γρίπης στην Ευρώπη κατά την εβδομάδα \Sexpr{rb$wklab}.</text:p>
      <text:p text:style-name="Text_20_body">Κατά την εβδομάδα \Sexpr{rb$wklab} κ<text:span text:style-name="T22">αι οι 38 χώρες που απέστειλαν δεδομένα, ανέφεραν χαμηλή δραστηριότητα της γρίπης (Map 1)</text:span>.</text:p>
      <text:p text:style-name="P27"><text:s/>Όσον αφορά στη γεωγραφική διασπορά, η Σουηδία ανέφερε εκτεταμένη κυκλοφορία των ιών γρίπης, 3 χώρες ανέφεραν τοπική μετάδοση ,ενώ 12 χώρες ανέφεραν αποραδικά κρούσματα (Map 2). </text:p>
      <text:p text:style-name="Text_20_body"><text:span text:style-name="T22">Δύο χώρες (Αζερμπαϊτζάν &amp; Βόρεια Ιρλανδία) ανέφεραν αυξητική τάση της δραστηριότητας σε σύγκριση με την προηγούμενη εβδομάδα</text:span> \Sexpr{paste(tgtweek %% 100 - 1, tgtweek %/%100, sep="/").</text:p>
      <text:p text:style-name="Text_20_body">Κατά την εβδομάδα \Sexpr{rb$wklab}, <text:span text:style-name="T22">το 4% των κλινικών δειγμάτων που ελήφθησαν από τα δίκτυα Sentinel ήταν θετικά για ιούς γρίπης και ΄όλα τα θετικά δείγματα τύπου Β. </text:span></text:p>
      <text:p text:style-name="Text_20_body">Από την εβδομάδα 40/\Sexpr{tgtyear} έως την εβδομάδα \Sexpr{rb$wklab}, <text:span text:style-name="T22">το 37% του συνόλου των κλινικών δειγμάτων που έχουν ληφθεί από τα δίκτυα Sentinel ήταν θετικά για ιούς γρίπης και εξ΄ αυτών το 67% ήταν τύπου Α και το 33% τύπου Β. Από τα στελέχη τύπου Α που υποτυποποιήθηκαν, το 77% ήταν Α(Η3Ν2). </text:span></text:p>
      <text:p text:style-name="Text_20_body">Από την εβδομάδα 40/\Sexpr{tgtyear} έως την εβδομάδα \Sexpr{rb$wklab}, <text:span text:style-name="T22">από τα 90.237 (23%) θετικά δείγματα στο σύνολο των 398.578 κλινικών δειγμάτων που έχουν ληφθεί από νοσοκομεία, τα 62.877 (70%) ήταν τύπου Α και τα 27.360 (30%) τύπου Β. Τα 25.995 από τα στελέχη τύπου Α υποτυποποιήθηκαν και εξ αυτών τα 19.439 (75%) ανήκαν στον υπότυπο A(H3N2) και τα 6.556 (25%) στον υπότυπο A(H1N1)pdm09.</text:span></text:p>
      <text:p text:style-name="Text_20_body">Κατά την εβδομάδα \Sexpr{rb$wklab}, <text:span text:style-name="T22">αναφέρθηκαν 2 σοβαρά κρούσματα εργαστηριακά επιβεβαιωμένης γρίπης με νοσηλεία σε νοσοκομείο. Και τα 2 προαναφερόμενα κρούσματα νοσηλεύτηκαν σε Μ.Ε.Θ και οφείλονταν στον ιό γρίπης τύπου Β. </text:span></text:p>
      <text:p text:style-name="Text_20_body">Συνολικά, από την εβδομάδα 40/\Sexpr{tgtyear} έως και την εβδομάδα \Sexpr{rb$wklab} έχουν δηλωθεί <text:span text:style-name="T22">6.023 κρούσματα εργαστηριακά επιβεβαιωμένης γρίπης με νοσηλεία σε νοσοκομείο, εκ των οποίων τα 3.776 νοσηλεύτηκαν σε Μ.Ε.Θ. Από τα 6.023 κρούσματα που νοσηλεύτηκαν σε νοσοκομεία, τα 4.744 (79%) οφείλονταν στον ιό γρίπης τύπου Α και τα 1.279 (21%) στον ιό γρίπης τύπου 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5"><draw:image xlink:href="Pictures/10000000000003A60000007D2C9BC97F6E769A54.png" xlink:type="simple" xlink:show="embed" xlink:actuate="onLoad"/></draw:frame><draw:frame draw:style-name="Mfr2" draw:name="Πλαίσιο1" text:anchor-type="char" svg:x="17.697cm" svg:y="1.741cm" svg:width="1.545cm" svg:height="1.326cm" draw:z-index="12"><draw:text-box><text:p text:style-name="Frame_20_contents"><text:s text:c="4"/><text:span text:style-name="page_20_number"><text:span text:style-name="MT3"><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meta:editing-cycles>263</meta:editing-cycles>
    <meta:print-date>2015-01-02T12:36:00</meta:print-date>
    <meta:creation-date>2015-01-22T07:51:00</meta:creation-date>
    <dc:date>2016-01-15T14:27:56.315605253</dc:date>
    <meta:editing-duration>PT10H56M17S</meta:editing-duration>
    <meta:generator>LibreOffice/5.0.4.2$Linux_X86_64 LibreOffice_project/00m0$Build-2</meta:generator>
    <dc:creator>Theodore Lytras</dc:creator>
    <meta:document-statistic meta:table-count="2" meta:image-count="2" meta:object-count="0" meta:page-count="13" meta:paragraph-count="123" meta:word-count="2499" meta:character-count="22400" meta:non-whitespace-character-count="198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