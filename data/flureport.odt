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8D0000006F63D0E25C07B74A12.png" manifest:media-type="image/png"/>
  <manifest:file-entry manifest:full-path="Pictures/10000000000003A60000007D0BF35FA6AF05F9A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Mangal1" svg:font-family="Mangal" style:font-family-generic="swiss"/>
    <style:font-face style:name="Fira Sans1" svg:font-family="'Fira Sans'" style:font-adornments="Έντονα" style:font-pitch="variable"/>
    <style:font-face style:name="Fira Sans" svg:font-family="'Fira Sans'" style:font-adornments="Κανονικά"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reeSans1" svg:font-family="FreeSans" style:font-adornments="µεσαία" style:font-family-generic="swiss" style:font-pitch="variable"/>
    <style:font-face style:name="FreeSans" svg:font-family="FreeSans" style:font-adornments="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Πίνακας1" style:family="table">
      <style:table-properties style:width="18.002cm" fo:margin-left="0cm" fo:margin-right="0cm" fo:margin-top="0cm" fo:margin-bottom="0cm" table:align="margins" style:may-break-between-rows="false" style:writing-mode="lr-tb"/>
    </style:style>
    <style:style style:name="Πίνακας1.A" style:family="table-column">
      <style:table-column-properties style:column-width="15.84cm" style:rel-column-width="57662*"/>
    </style:style>
    <style:style style:name="Πίνακας1.B" style:family="table-column">
      <style:table-column-properties style:column-width="2.163cm" style:rel-column-width="7873*"/>
    </style:style>
    <style:style style:name="Πίνακας1.1" style:family="table-row">
      <style:table-row-properties style:row-height="1cm" fo:keep-together="auto"/>
    </style:style>
    <style:style style:name="Πίνακας1.A1" style:family="table-cell">
      <style:table-cell-properties style:vertical-align="middle" style:border-line-width-left="0.079cm 0.026cm 0.026cm" style:border-line-width-top="0.079cm 0.026cm 0.026cm" fo:padding-left="0.191cm" fo:padding-right="0.191cm" fo:padding-top="0cm" fo:padding-bottom="0cm" fo:border-left="3.75pt double #00000a" fo:border-right="0.5pt solid #000001" fo:border-top="3.75pt double #00000a" fo:border-bottom="0.5pt solid #000001"/>
    </style:style>
    <style:style style:name="Πίνακας1.B1" style:family="table-cell">
      <style:table-cell-properties style:vertical-align="middle" style:border-line-width-right="0.079cm 0.026cm 0.026cm" style:border-line-width-top="0.079cm 0.026cm 0.026cm" fo:padding-left="0.191cm" fo:padding-right="0.191cm" fo:padding-top="0cm" fo:padding-bottom="0cm" fo:border-left="0.5pt solid #000001" fo:border-right="3.75pt double #00000a" fo:border-top="3.75pt double #00000a" fo:border-bottom="0.5pt solid #000001"/>
    </style:style>
    <style:style style:name="Πίνακας1.A2" style:family="table-cell">
      <style:table-cell-properties style:vertical-align="middle" style:border-line-width-left="0.079cm 0.026cm 0.026cm" style:border-line-width-bottom="0.079cm 0.026cm 0.026cm" fo:padding-left="0.191cm" fo:padding-right="0.191cm" fo:padding-top="0cm" fo:padding-bottom="0cm" fo:border-left="3.75pt double #00000a" fo:border-right="0.5pt solid #000001" fo:border-top="0.5pt solid #000001" fo:border-bottom="3.75pt double #00000a"/>
    </style:style>
    <style:style style:name="Πίνακας1.B2" style:family="table-cell">
      <style:table-cell-properties style:vertical-align="middle" style:border-line-width-right="0.079cm 0.026cm 0.026cm" style:border-line-width-bottom="0.079cm 0.026cm 0.026cm" fo:padding-left="0.191cm" fo:padding-right="0.191cm" fo:padding-top="0cm" fo:padding-bottom="0cm" fo:border-left="0.5pt solid #000001" fo:border-right="3.75pt double #00000a" fo:border-top="0.5pt solid #000001" fo:border-bottom="3.75pt double #00000a"/>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852cm" fo:margin-top="0cm" fo:margin-bottom="0cm" loext:contextual-spacing="false" fo:text-align="center" style:justify-single-word="false" fo:text-indent="0cm" style:auto-text-indent="false"/>
      <style:text-properties style:font-name="Arial1" fo:font-size="14pt" style:font-size-asian="14pt" style:font-name-complex="Arial2" style:font-size-complex="14pt"/>
    </style:style>
    <style:style style:name="P3" style:family="paragraph" style:parent-style-name="Text_20_body">
      <style:paragraph-properties fo:margin-top="0cm" fo:margin-bottom="0cm" loext:contextual-spacing="false" fo:line-height="100%"/>
    </style:style>
    <style:style style:name="P4" style:family="paragraph" style:parent-style-name="Text_20_body">
      <style:paragraph-properties fo:margin-top="0cm" fo:margin-bottom="0cm" loext:contextual-spacing="false" fo:line-height="100%"/>
      <style:text-properties officeooo:paragraph-rsid="0086067c"/>
    </style:style>
    <style:style style:name="P5" style:family="paragraph" style:parent-style-name="Text_20_body">
      <style:paragraph-properties fo:margin-top="0cm" fo:margin-bottom="0cm" loext:contextual-spacing="false" fo:line-height="100%"/>
      <style:text-properties officeooo:paragraph-rsid="0087a9af"/>
    </style:style>
    <style:style style:name="P6" style:family="paragraph" style:parent-style-name="Text_20_body">
      <style:paragraph-properties fo:margin-top="0cm" fo:margin-bottom="0cm" loext:contextual-spacing="false" fo:line-height="100%"/>
      <style:text-properties officeooo:paragraph-rsid="0091da7c"/>
    </style:style>
    <style:style style:name="P7" style:family="paragraph" style:parent-style-name="Text_20_body">
      <style:paragraph-properties fo:margin-top="0cm" fo:margin-bottom="0cm" loext:contextual-spacing="false" fo:line-height="100%"/>
      <style:text-properties officeooo:rsid="002cd046" officeooo:paragraph-rsid="002cd046"/>
    </style:style>
    <style:style style:name="P8" style:family="paragraph" style:parent-style-name="Text_20_body">
      <style:paragraph-properties fo:margin-top="0cm" fo:margin-bottom="0cm" loext:contextual-spacing="false" fo:line-height="100%"/>
      <style:text-properties officeooo:rsid="002cd046" officeooo:paragraph-rsid="00a90787"/>
    </style:style>
    <style:style style:name="P9" style:family="paragraph" style:parent-style-name="Text_20_body">
      <style:paragraph-properties fo:margin-top="0cm" fo:margin-bottom="0cm" loext:contextual-spacing="false" fo:line-height="100%"/>
      <style:text-properties officeooo:rsid="002cd046" officeooo:paragraph-rsid="00d1bea2"/>
    </style:style>
    <style:style style:name="P10" style:family="paragraph" style:parent-style-name="Text_20_body">
      <style:paragraph-properties fo:margin-top="0cm" fo:margin-bottom="0cm" loext:contextual-spacing="false" fo:line-height="100%"/>
      <style:text-properties officeooo:rsid="007b5304" officeooo:paragraph-rsid="007b5304"/>
    </style:style>
    <style:style style:name="P11" style:family="paragraph" style:parent-style-name="Text_20_body">
      <style:paragraph-properties fo:margin-top="0cm" fo:margin-bottom="0cm" loext:contextual-spacing="false" fo:line-height="100%"/>
      <style:text-properties officeooo:rsid="007b5304" officeooo:paragraph-rsid="0085843e"/>
    </style:style>
    <style:style style:name="P12" style:family="paragraph" style:parent-style-name="Text_20_body">
      <style:paragraph-properties fo:margin-top="0cm" fo:margin-bottom="0cm" loext:contextual-spacing="false" fo:line-height="100%"/>
      <style:text-properties officeooo:rsid="007b5304" officeooo:paragraph-rsid="00864224"/>
    </style:style>
    <style:style style:name="P13" style:family="paragraph" style:parent-style-name="Text_20_body">
      <style:paragraph-properties fo:margin-top="0cm" fo:margin-bottom="0cm" loext:contextual-spacing="false" fo:line-height="100%"/>
      <style:text-properties officeooo:rsid="007b5304" officeooo:paragraph-rsid="0087a9af"/>
    </style:style>
    <style:style style:name="P14" style:family="paragraph" style:parent-style-name="Text_20_body">
      <style:paragraph-properties fo:margin-top="0cm" fo:margin-bottom="0cm" loext:contextual-spacing="false" fo:line-height="100%"/>
      <style:text-properties officeooo:rsid="007b5304" officeooo:paragraph-rsid="00bbd173"/>
    </style:style>
    <style:style style:name="P15" style:family="paragraph" style:parent-style-name="Text_20_body">
      <style:paragraph-properties fo:margin-top="0cm" fo:margin-bottom="0cm" loext:contextual-spacing="false" fo:line-height="100%"/>
      <style:text-properties officeooo:rsid="007b5304" officeooo:paragraph-rsid="00d1bea2"/>
    </style:style>
    <style:style style:name="P16" style:family="paragraph" style:parent-style-name="Text_20_body">
      <style:paragraph-properties fo:margin-top="0cm" fo:margin-bottom="0cm" loext:contextual-spacing="false" fo:line-height="100%"/>
      <style:text-properties officeooo:rsid="006713ba" officeooo:paragraph-rsid="006713ba"/>
    </style:style>
    <style:style style:name="P17" style:family="paragraph" style:parent-style-name="Text_20_body">
      <style:paragraph-properties fo:margin-top="0cm" fo:margin-bottom="0cm" loext:contextual-spacing="false" fo:line-height="100%"/>
      <style:text-properties officeooo:rsid="006713ba" officeooo:paragraph-rsid="0087a9af"/>
    </style:style>
    <style:style style:name="P18" style:family="paragraph" style:parent-style-name="Text_20_body">
      <style:paragraph-properties fo:margin-top="0cm" fo:margin-bottom="0cm" loext:contextual-spacing="false" fo:line-height="100%"/>
      <style:text-properties officeooo:rsid="006713ba" officeooo:paragraph-rsid="0086067c"/>
    </style:style>
    <style:style style:name="P19" style:family="paragraph" style:parent-style-name="Text_20_body">
      <style:paragraph-properties fo:margin-top="0cm" fo:margin-bottom="0cm" loext:contextual-spacing="false" fo:line-height="100%"/>
      <style:text-properties officeooo:rsid="0062d7e6" officeooo:paragraph-rsid="0068a71b"/>
    </style:style>
    <style:style style:name="P20" style:family="paragraph" style:parent-style-name="Text_20_body">
      <style:paragraph-properties fo:margin-top="0cm" fo:margin-bottom="0cm" loext:contextual-spacing="false" fo:line-height="100%"/>
      <style:text-properties officeooo:rsid="00a17a87" officeooo:paragraph-rsid="00a17a87"/>
    </style:style>
    <style:style style:name="P21" style:family="paragraph" style:parent-style-name="Text_20_body">
      <style:paragraph-properties fo:margin-top="0cm" fo:margin-bottom="0cm" loext:contextual-spacing="false" fo:line-height="100%"/>
      <style:text-properties officeooo:rsid="00a17a87" officeooo:paragraph-rsid="00bbd173"/>
    </style:style>
    <style:style style:name="P22" style:family="paragraph" style:parent-style-name="Text_20_body">
      <style:paragraph-properties fo:margin-top="0cm" fo:margin-bottom="0cm" loext:contextual-spacing="false" fo:line-height="100%"/>
      <style:text-properties officeooo:rsid="00a563f0" officeooo:paragraph-rsid="00a563f0"/>
    </style:style>
    <style:style style:name="P23" style:family="paragraph" style:parent-style-name="Text_20_body">
      <style:paragraph-properties fo:margin-top="0cm" fo:margin-bottom="0cm" loext:contextual-spacing="false" fo:line-height="100%"/>
      <style:text-properties officeooo:rsid="00a6e561" officeooo:paragraph-rsid="00a6e561"/>
    </style:style>
    <style:style style:name="P24" style:family="paragraph" style:parent-style-name="Text_20_body">
      <style:paragraph-properties fo:margin-top="0cm" fo:margin-bottom="0cm" loext:contextual-spacing="false" fo:line-height="100%"/>
      <style:text-properties officeooo:rsid="006aab8c" officeooo:paragraph-rsid="00a843ce"/>
    </style:style>
    <style:style style:name="P25" style:family="paragraph" style:parent-style-name="Text_20_body">
      <style:paragraph-properties fo:margin-top="0cm" fo:margin-bottom="0cm" loext:contextual-spacing="false" fo:line-height="100%"/>
      <style:text-properties officeooo:rsid="00b85083" officeooo:paragraph-rsid="00b85083"/>
    </style:style>
    <style:style style:name="P26" style:family="paragraph" style:parent-style-name="Text_20_body">
      <style:paragraph-properties fo:margin-top="0cm" fo:margin-bottom="0cm" loext:contextual-spacing="false" fo:line-height="100%"/>
      <style:text-properties officeooo:rsid="00b85083" officeooo:paragraph-rsid="00c432ab"/>
    </style:style>
    <style:style style:name="P27" style:family="paragraph" style:parent-style-name="Text_20_body">
      <style:paragraph-properties fo:margin-top="0cm" fo:margin-bottom="0cm" loext:contextual-spacing="false" fo:line-height="100%"/>
      <style:text-properties officeooo:rsid="00c1dae5" officeooo:paragraph-rsid="00c1dae5"/>
    </style:style>
    <style:style style:name="P28" style:family="paragraph" style:parent-style-name="Text_20_body">
      <style:text-properties officeooo:rsid="002cd046" officeooo:paragraph-rsid="002cd046"/>
    </style:style>
    <style:style style:name="P29" style:family="paragraph" style:parent-style-name="Text_20_body">
      <style:text-properties officeooo:rsid="002cd046" officeooo:paragraph-rsid="00b8406f"/>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officeooo:paragraph-rsid="002cd046"/>
    </style:style>
    <style:style style:name="P32" style:family="paragraph" style:parent-style-name="Text_20_body">
      <style:text-properties officeooo:rsid="00440472" officeooo:paragraph-rsid="00440472"/>
    </style:style>
    <style:style style:name="P33" style:family="paragraph" style:parent-style-name="Text_20_body">
      <style:text-properties fo:font-size="6pt" style:font-size-asian="5.25pt" style:font-size-complex="6pt"/>
    </style:style>
    <style:style style:name="P34" style:family="paragraph" style:parent-style-name="Text_20_body">
      <style:text-properties officeooo:paragraph-rsid="005f83c2"/>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officeooo:rsid="00a373de" officeooo:paragraph-rsid="00a373de"/>
    </style:style>
    <style:style style:name="P37" style:family="paragraph" style:parent-style-name="Text_20_body">
      <style:text-properties officeooo:paragraph-rsid="00a88067"/>
    </style:style>
    <style:style style:name="P38" style:family="paragraph" style:parent-style-name="Text_20_body">
      <style:text-properties officeooo:rsid="00ab81fd" officeooo:paragraph-rsid="00ab81fd"/>
    </style:style>
    <style:style style:name="P39" style:family="paragraph" style:parent-style-name="Text_20_body">
      <style:text-properties officeooo:paragraph-rsid="00b8406f"/>
    </style:style>
    <style:style style:name="P40" style:family="paragraph" style:parent-style-name="Heading_20_1">
      <style:text-properties officeooo:paragraph-rsid="002aef87"/>
    </style:style>
    <style:style style:name="P41" style:family="paragraph" style:parent-style-name="Heading_20_2">
      <style:paragraph-properties fo:break-before="page"/>
    </style:style>
    <style:style style:name="P42" style:family="paragraph" style:parent-style-name="Heading_20_3">
      <style:paragraph-properties fo:break-before="page"/>
    </style:style>
    <style:style style:name="P43" style:family="paragraph" style:parent-style-name="Heading_20_3">
      <style:paragraph-properties fo:break-before="page"/>
      <style:text-properties officeooo:paragraph-rsid="0061705b"/>
    </style:style>
    <style:style style:name="P44" style:family="paragraph" style:parent-style-name="Heading_20_4">
      <style:paragraph-properties fo:break-before="page"/>
    </style:style>
    <style:style style:name="P45" style:family="paragraph" style:parent-style-name="Heading_20_4">
      <style:paragraph-properties fo:break-before="page"/>
      <style:text-properties officeooo:paragraph-rsid="00b8406f"/>
    </style:style>
    <style:style style:name="P46" style:family="paragraph" style:parent-style-name="Standard">
      <style:paragraph-properties fo:margin-left="0cm" fo:margin-right="-1.002cm" fo:margin-top="0cm" fo:margin-bottom="0cm" loext:contextual-spacing="false" fo:line-height="100%" fo:text-align="justify" style:justify-single-word="false" fo:text-indent="0cm" style:auto-text-indent="false"/>
    </style:style>
    <style:style style:name="P47" style:family="paragraph" style:parent-style-name="Text_20_body">
      <style:paragraph-properties fo:padding="0.074cm" fo:border-left="none" fo:border-right="none" fo:border-top="none" fo:border-bottom="0.06pt solid #000000" style:join-border="false"/>
      <style:text-properties officeooo:rsid="00d84889"/>
    </style:style>
    <style:style style:name="P48" style:family="paragraph" style:parent-style-name="Text_20_body" style:list-style-name="L1"/>
    <style:style style:name="P49" style:family="paragraph" style:parent-style-name="Text_20_body" style:list-style-name="L1">
      <style:text-properties fo:font-weight="bold" officeooo:rsid="002c28f8" officeooo:paragraph-rsid="002c28f8" fo:background-color="transparent" style:font-weight-asian="bold" style:font-weight-complex="bold"/>
    </style:style>
    <style:style style:name="P50" style:family="paragraph" style:parent-style-name="Text_20_body">
      <style:text-properties fo:font-style="italic" style:font-style-asian="italic" style:font-style-complex="italic"/>
    </style:style>
    <style:style style:name="P51" style:family="paragraph" style:parent-style-name="Heading_20_1" style:master-page-name="Standard">
      <style:paragraph-properties style:page-number="auto"/>
    </style:style>
    <style:style style:name="P52" style:family="paragraph" style:parent-style-name="Λεζάντα1" style:list-style-name="WWNum3"/>
    <style:style style:name="T1" style:family="text">
      <style:text-properties fo:language="en" fo:country="US"/>
    </style:style>
    <style:style style:name="T2" style:family="text">
      <style:text-properties fo:language="en" fo:country="US" officeooo:rsid="0019b0cf" fo:background-color="#00ffff" loext:char-shading-value="0"/>
    </style:style>
    <style:style style:name="T3" style:family="text">
      <style:text-properties fo:language="en" fo:country="US" officeooo:rsid="00ab81fd" fo:background-color="#00ffff" loext:char-shading-value="0"/>
    </style:style>
    <style:style style:name="T4" style:family="text">
      <style:text-properties fo:language="en" fo:country="US" officeooo:rsid="0092fad3"/>
    </style:style>
    <style:style style:name="T5" style:family="text">
      <style:text-properties fo:language="en" fo:country="US" officeooo:rsid="00a0b41d"/>
    </style:style>
    <style:style style:name="T6" style:family="text">
      <style:text-properties fo:language="en" fo:country="US" officeooo:rsid="00aac232"/>
    </style:style>
    <style:style style:name="T7" style:family="text">
      <style:text-properties fo:language="en" fo:country="US" officeooo:rsid="00df3a24"/>
    </style:style>
    <style:style style:name="T8" style:family="text">
      <style:text-properties fo:font-size="12pt" fo:font-weight="bold" style:font-size-asian="12pt" style:font-weight-asian="bold" style:font-size-complex="12pt"/>
    </style:style>
    <style:style style:name="T9" style:family="text">
      <style:text-properties style:language-asian="el" style:country-asian="GR"/>
    </style:style>
    <style:style style:name="T10" style:family="text">
      <style:text-properties officeooo:rsid="00b8406f" style:language-asian="el" style:country-asian="GR"/>
    </style:style>
    <style:style style:name="T11" style:family="text">
      <style:text-properties officeooo:rsid="00d6967d" style:language-asian="el" style:country-asian="GR"/>
    </style:style>
    <style:style style:name="T12" style:family="text">
      <style:text-properties officeooo:rsid="003ff3e1"/>
    </style:style>
    <style:style style:name="T13" style:family="text">
      <style:text-properties officeooo:rsid="0045a3d9"/>
    </style:style>
    <style:style style:name="T14" style:family="text">
      <style:text-properties officeooo:rsid="0046a949"/>
    </style:style>
    <style:style style:name="T15" style:family="text">
      <style:text-properties fo:background-color="#00ffff" loext:char-shading-value="0"/>
    </style:style>
    <style:style style:name="T16" style:family="text">
      <style:text-properties fo:font-style="italic" style:text-underline-style="solid" style:text-underline-width="auto" style:text-underline-color="font-color" fo:font-weight="bold" style:language-asian="el" style:country-asian="GR" style:font-style-asian="italic" style:font-weight-asian="bold" style:font-style-complex="italic" style:font-weight-complex="bold"/>
    </style:style>
    <style:style style:name="T17" style:family="text">
      <style:text-properties fo:font-style="italic" style:text-underline-style="none" fo:font-weight="bold" style:language-asian="el" style:country-asian="GR" style:font-style-asian="italic" style:font-weight-asian="bold" style:font-style-complex="italic" style:font-weight-complex="bold"/>
    </style:style>
    <style:style style:name="T18" style:family="text">
      <style:text-properties officeooo:rsid="005c172c"/>
    </style:style>
    <style:style style:name="T19" style:family="text">
      <style:text-properties officeooo:rsid="005f83c2"/>
    </style:style>
    <style:style style:name="T20" style:family="text">
      <style:text-properties officeooo:rsid="006be3b4"/>
    </style:style>
    <style:style style:name="T21" style:family="text">
      <style:text-properties officeooo:rsid="0087a9af"/>
    </style:style>
    <style:style style:name="T22" style:family="text">
      <style:text-properties officeooo:rsid="0091da7c"/>
    </style:style>
    <style:style style:name="T23" style:family="text">
      <style:text-properties officeooo:rsid="009b1347"/>
    </style:style>
    <style:style style:name="T24" style:family="text">
      <style:text-properties officeooo:rsid="00a0b41d"/>
    </style:style>
    <style:style style:name="T25" style:family="text">
      <style:text-properties officeooo:rsid="00a5263c"/>
    </style:style>
    <style:style style:name="T26" style:family="text">
      <style:text-properties officeooo:rsid="00a88067"/>
    </style:style>
    <style:style style:name="T27" style:family="text">
      <style:text-properties fo:font-style="normal" style:font-style-asian="normal" style:font-style-complex="normal"/>
    </style:style>
    <style:style style:name="T28" style:family="text">
      <style:text-properties fo:font-style="normal" officeooo:rsid="00a88067" style:font-style-asian="normal" style:font-style-complex="normal"/>
    </style:style>
    <style:style style:name="T29" style:family="text">
      <style:text-properties officeooo:rsid="00a90787"/>
    </style:style>
    <style:style style:name="T30" style:family="text">
      <style:text-properties officeooo:rsid="00aac232"/>
    </style:style>
    <style:style style:name="T31" style:family="text">
      <style:text-properties officeooo:rsid="00ab81fd"/>
    </style:style>
    <style:style style:name="T32" style:family="text">
      <style:text-properties officeooo:rsid="00b8406f"/>
    </style:style>
    <style:style style:name="T33" style:family="text">
      <style:text-properties officeooo:rsid="00b85083"/>
    </style:style>
    <style:style style:name="T34" style:family="text">
      <style:text-properties officeooo:rsid="00bdef11"/>
    </style:style>
    <style:style style:name="T35" style:family="text">
      <style:text-properties officeooo:rsid="00c432ab"/>
    </style:style>
    <style:style style:name="T36" style:family="text">
      <style:text-properties officeooo:rsid="00c49de6"/>
    </style:style>
    <style:style style:name="T37" style:family="text">
      <style:text-properties officeooo:rsid="00c4c4d8"/>
    </style:style>
    <style:style style:name="T38" style:family="text">
      <style:text-properties officeooo:rsid="00c823ec"/>
    </style:style>
    <style:style style:name="T39" style:family="text">
      <style:text-properties officeooo:rsid="00d84889"/>
    </style:style>
    <style:style style:name="T40" style:family="text">
      <style:text-properties officeooo:rsid="00dd4a6d"/>
    </style:style>
    <style:style style:name="T41" style:family="text">
      <style:text-properties officeooo:rsid="00df59aa"/>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2" style:family="graphic" style:parent-style-name="Frame">
      <style:graphic-properties style:wrap="none" style:vertical-pos="top" style:vertical-rel="paragraph-content" style:horizontal-pos="center" style:horizontal-rel="paragraph" fo:padding-left="0cm" fo:padding-right="0.7cm" fo:padding-top="0.15cm" fo:padding-bottom="0.15cm" fo:border="1.5pt solid #800000" style:shadow="none" draw:shadow-opacity="100%"/>
    </style:style>
    <style:style style:name="fr3" style:family="graphic" style:parent-style-name="Graphics">
      <style:graphic-properties fo:margin-left="0cm" fo:margin-right="0cm" fo:margin-top="0cm" fo:margin-bottom="0cm" style:vertical-pos="top" style:vertical-rel="baseline" draw:fill-image-width="0cm" draw:fill-image-height="0cm" fo:padding="0cm" fo:border="none" style:shadow="none" draw:shadow-opacity="100%" style:mirror="none" fo:clip="rect(0cm, 0.051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non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Εικόνα 224" text:anchor-type="page" text:anchor-page-number="1" svg:x="8.969cm" svg:y="2.616cm" svg:width="3.731cm" svg:height="2.54cm" draw:z-index="26">
        <draw:image xlink:href="Pictures/100002010000008D0000006F63D0E25C07B74A12.png" xlink:type="simple" xlink:show="embed" xlink:actuate="onLoad"/>
      </draw:frame>
      <text:h text:style-name="P51" text:outline-level="1">Εβδομαδιαία Έκθεση</text:h>
      <text:h text:style-name="Heading_20_1" text:outline-level="1">Επιδημιολογικής Επιτήρησης της Γρίπης</text:h>
      <text:h text:style-name="P40" text:outline-level="1"><text:span text:style-name="T1"><text:s/>E</text:span>βδομάδα \Sexpr{rb$wklab}</text:h>
      <text:p text:style-name="P2"/>
      <text:p text:style-name="Text_20_body">Η επιτήρηση της γρίπης για την περίοδο \Sexpr{paste(tgtyear, “–”, tgtyear+1)} σε Ευρωπαϊκό επίπεδο και στην Ελλάδα ξεκίνησε την εβδομάδα 40/\Sexpr{tgtyear} (\Sexpr{formatDate(c(isoweekStart(tgtyear*100+40), isoweekStart(tgtyear*100+40)+6))}) και θα ολοκληρωθεί την εβδομάδα \Sexpr{rb$seasEndLab}.</text:p>
      <text:p text:style-name="Text_20_body">Στην παρούσα έκθεση, γίνεται εβδομαδιαία ανακεφαλαίωση των επιδημιολογικών δεδομένων στη χώρα μας, για την εβδομάδα \Sexpr{rb$wklab}. </text:p>
      <text:p text:style-name="P33"><draw:frame draw:style-name="fr2" draw:name="Πλαίσιο2" text:anchor-type="paragraph" svg:width="18.999cm" draw:z-index="27"><draw:text-box fo:min-height="0.755cm"><text:list xml:id="list7511973761105387161" text:style-name="L1"><text:list-item><text:p text:style-name="P48">Κατά την εβδομάδα \Sexpr{rb$wklab} οι επισκέψεις σε ιατρό για γριπώδη συνδρομή <text:span text:style-name="T15">παρουσιάζουν περαιτέρω αύξηση</text:span> σε σύγκριση με την προηγούμενη εβδομάδα \Sexpr{paste(tgtweek %% 100 - 1, tgtweek %/%100, sep="/")} (Διάγραμμα 1).</text:p></text:list-item><text:list-item><text:p text:style-name="P48">Κατά την εβδομάδα \Sexpr{rb$wklab} στα Εργαστήρια Αναφοράς Γρίπης ελέγχθηκαν για ιούς γρίπης συνολικά \Sexpr{rowSums(rb$summSwab)["Total"]} κλινικά δείγματα και συγκεκριμένα \Sexpr{rb$summSwab["Total", "nosok"]} από νοσοκομεία και \Sexpr{rb$summSwab["Total", "sentinel"]} από τα δίκτυα Sentinel.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c("A.H3N2.", "A.H1N1.pdm09"))} ανήκαν στον υπότυπο Α(Η3Ν2) και τα \Sexpr{rb$summF("A.H1N1.pdm09", c("A.H3N2.", "A.H1N1.pdm09"))} στον υπότυπο Α(Η1Ν1)pdm (Διάγραμμα 3).</text:p></text:list-item><text:list-item><text:p text:style-name="P48">Από την εβδομάδα 40/\Sexpr{tgtyear} έως και την εβδομάδα \Sexpr{rb$wklab} καταγράφηκαν \Sexpr{nrow(rb$meth) + nrow(rb$outOfMeth)} σοβαρά κρούσματα εργαστηριακά επιβεβαιωμένης γρίπης, εκ των οποίων τα \Sexpr{nrow(rb$meth)} νοσηλεύτηκαν σε Μ.Ε.Θ. (Πίνακας 1, Διάγραμμα 4). Μόνο τo \Sexpr{round((sum(rb$meth$vacc, na.rm=TRUE) + sum(rb$outOfMeth$vacc, na.rm=TRUE))*100/(nrow(rb$meth)+nrow(rb$outOfMeth)))}% του συνόλου των ασθενών αυτών είχαν εμβολιαστεί για τη γρίπη. Το ίδιο χρονικό διάστημα καταγράφηκαν συνολικά \Sexpr{sum(totDeaths$yearweek&lt;=tgtweek, na.rm=TRUE)} θάνατοι από εργαστηριακά επιβεβαιωμένη γρίπη. Οι \Sexpr{with(totDeaths, sum(yearweek&lt;=tgtweek &amp; meth, na.rm=TRUE))} θάνατοι αφορούσαν σε ασθενείς που νοσηλεύτηκαν σε Μ.Ε.Θ και \Sexpr{with(totDeaths, sum(yearweek&lt;=tgtweek &amp; !meth, na.rm=TRUE))} σε ασθενή χωρίς νοσηλεία σε Μ.Ε.Θ (Πίνακας 1, Διάγραμμα 5). Από το σύνολο των \Sexpr{sum(totDeaths$yearweek&lt;=tgtweek, na.rm=TRUE)} που πέθαναν, μόνο το \Sexpr{round(sum(rb$totDeaths$vacc, na.rm=TRUE)*100/nrow(rb$totDeaths))}% ήταν εμβολιασμένοι για τη γρίπη.</text:p></text:list-item><text:list-item><text:p text:style-name="P49">Με βάση τα ανωτέρω, η δραστηριότητα της γρίπης στην Ελλάδα <text:span text:style-name="T15">συνεχίζει να παρουσιάζει ανοδική τάση.</text:span></text:p></text:list-item></text:list></draw:text-box></draw:frame><text:soft-page-break/></text:p>
      <text:p text:style-name="P44">Α. Κλινικό σκέλος επιδημιολογικής επιτήρησης της γρίπης</text:p>
      <text:p text:style-name="Text_20_body">Κατά την εβδομάδα \Sexpr{rb$wklab}, οι επισκέψεις σε ιατρό για γριπώδη συνδρομή <text:span text:style-name="T15">παρουσιάζουν περαιτέρω αύξηση</text:span> σε σύγκριση με την προηγούμενη εβδομάδα \Sexpr{paste(tgtweek %% 100 - 1, tgtweek %/%100, sep="/")} (Διάγραμμα 1). </text:p>
      <text:p text:style-name="Heading_20_4">Διάγραμμα 1: Εκτίμηση αριθμού κρουσμάτων γριπώδους συνδρομής ανά 1.000 επισκέψεις, κατά εβδομάδα. Σύνολο χώρας, περίοδοι γρίπης: <text:s/>\Sexpr{paste(sapply(-1:0, function(i)paste(i+tgtyear,i+tgtyear+1,sep="-")), collapse=", ")}.</text:p>
      <text:p text:style-name="P28">&lt;&lt;diag1, echo = FALSE, fig = TRUE, results = <text:span text:style-name="T12">xml</text:span>&gt;&gt;=</text:p>
      <text:p text:style-name="P12">imgDefs &lt;- getImageDefs()</text:p>
      <text:p text:style-name="P10">imgDefs$plotHeight &lt;- 1680</text:p>
      <text:p text:style-name="P10">imgDefs$plotWidth &lt;- 2800</text:p>
      <text:p text:style-name="P10">imgDefs$dispHeight &lt;- “4.5”</text:p>
      <text:p text:style-name="P13">imgDefs$dispWidth &lt;- <text:span text:style-name="T21">gsub(",", ".", as.character(4.5*2800/1680), fixed=TRUE)</text:span></text:p>
      <text:p text:style-name="P10">imgDefs$args &lt;- list(res=288)</text:p>
      <text:p text:style-name="P11">setImageDefs(imgDefs)</text:p>
      <text:p text:style-name="P7"/>
      <text:p text:style-name="P20">par(family=”Fira Sans”)</text:p>
      <text:p text:style-name="P8">sentinel_graph(ytp, col=c("navyblue","red3"), lty=c(3,1), lwd=c(1,1.5), ci=ciInPlot, <text:span text:style-name="T29">alpha=c(0.08,0.15),</text:span></text:p>
      <text:p text:style-name="P7"><text:s text:c="6"/>ylab="Κρούσματα γριπώδους συνδρομής ανά 1000 επισκέψεις")</text:p>
      <text:p text:style-name="P28">@</text:p>
      <text:p text:style-name="P31"/>
      <text:p text:style-name="Λεζάντα1">Σημείωση <text:span text:style-name="T5">1</text:span>: <text:tab/>Ο αριθμός κρουσμάτων ανά 1.000 επισκέψεις εκτιμάται με στάθμιση ως προς τον μόνιμο πληθυσμό της χώρας κατά γεωγραφικό διαμέρισμα και αστικότητα (ΕΣΥΕ, απογραφή 20<text:span text:style-name="T24">1</text:span>1). <text:span text:style-name="T26">Η σκιασμένη περιοχή αντιπροσωπεύει τα 95% όρια εμπιστοσύνης των εκτιμήσεων.</text:span></text:p>
      <text:p text:style-name="Λεζάντα1">Σημείωση <text:span text:style-name="T24">2</text:span>: <text:s/><text:tab/>Προσωρινά στοιχεία. <text:s/>Επισημαίνεται ότι μπορεί να υπάρξουν μικρές τροποποιήσεις της επιδημικής καμπύλης, δεδομένου ότι συνεχίζεται η αποστολή δεδομένων από τα δίκτυα <text:span text:style-name="T1">Sentinel</text:span> και μετά την έκδοση της παρούσας έκθεσης. </text:p>
      <text:p text:style-name="P45">Διάγραμμα <text:span text:style-name="T32">2</text:span>: Εκτίμηση αριθμού κρουσμάτων γριπώδους συνδρομής ανά 1.000 επισκέψεις, κατά εβδομάδα, <text:span text:style-name="T32">ανά ηλικιακή ομάδα</text:span>. Σύνολο χώρας, περίοδοι γρίπης: <text:s/>\Sexpr{paste(sapply(-1:0, function(i)paste(i+tgtyear,i+tgtyear+1,sep="-")), collapse=", ")}.</text:p>
      <text:p text:style-name="P29">&lt;&lt;diag<text:span text:style-name="T32">2</text:span>, echo = FALSE, fig = TRUE, results = <text:span text:style-name="T12">xml</text:span>&gt;&gt;=</text:p>
      <text:p text:style-name="P14">imgDefs &lt;- getImageDefs()</text:p>
      <text:p text:style-name="P14">imgDefs$plotHeight &lt;- 1680*<text:span text:style-name="T34">1.7</text:span></text:p>
      <text:p text:style-name="P14">imgDefs$plotWidth &lt;- 2800</text:p>
      <text:p text:style-name="P14">imgDefs$dispHeight &lt;- “<text:span text:style-name="T34">7.65</text:span>”</text:p>
      <text:p text:style-name="P14">imgDefs$dispWidth &lt;- <text:span text:style-name="T21">gsub(",", ".", as.character(7.65*2800/(1680*1.7)), fixed=TRUE)</text:span></text:p>
      <text:p text:style-name="P14">imgDefs$args &lt;- list(res=288)</text:p>
      <text:p text:style-name="P14">setImageDefs(imgDefs)</text:p>
      <text:p text:style-name="P21"/>
      <text:p text:style-name="P21">par(family=”Fira Sans”, <text:span text:style-name="T33">mfrow</text:span>=<text:span text:style-name="T33">c(4,1)</text:span>)</text:p>
      <text:p text:style-name="P25">sentinel_graph(ytp, "resGri1", col=c("navyblue","red3"), lty=c(3,1), lwd=c(1,1.5), ci=ciInPlot, alpha=c(0.08,0.15), <text:span text:style-name="T35">ylab=NA</text:span>)</text:p>
      <text:p text:style-name="P25">mtext("Ηλικίες 0-4 ετών", side=3, cex=1.1)</text:p>
      <text:p text:style-name="P26">sentinel_graph(ytp, "resGri2", col=c("navyblue","red3"), lty=c(3,1), lwd=c(1,1.5), ci=ciInPlot, alpha=c(0.08,0.15), <text:span text:style-name="T35">ylab=NA</text:span>)</text:p>
      <text:p text:style-name="P25">mtext("Ηλικίες 5-14 ετών", side=3, cex=1.1)</text:p>
      <text:p text:style-name="P26">sentinel_graph(ytp, "resGri3", col=c("navyblue","red3"), lty=c(3,1), lwd=c(1,1.5), ci=ciInPlot, alpha=c(0.08,0.15), <text:span text:style-name="T35">ylab=NA</text:span>)</text:p>
      <text:p text:style-name="P25">mtext("Ηλικίες 15-64 ετών", side=3, cex=1.1)</text:p>
      <text:p text:style-name="P26">sentinel_graph(ytp, "resGri4", col=c("navyblue","red3"), lty=c(3,1), lwd=c(1,1.5), ci=ciInPlot, alpha=c(0.08,0.15), <text:span text:style-name="T35">ylab=NA</text:span>)</text:p>
      <text:p text:style-name="P25">mtext("Ηλικίες &gt;=65 ετών", side=3, cex=1.1)</text:p>
      <text:p text:style-name="P27">mtext("Κρ<text:span text:style-name="T38">ούσματα</text:span> γριπώδους συνδρομής ανά 1000 επισκέψεις", side=2, outer=TRUE, line=-1.<text:span text:style-name="T36">3</text:span>, cex=1.<text:span text:style-name="T37">1</text:span>)</text:p>
      <text:p text:style-name="P29">@</text:p>
      <text:p text:style-name="P39"/>
      <text:p text:style-name="P42">Πηγή των πληροφοριών για το κλινικό σκέλος επιδημιολογικής επιτήρησης</text:p>
      <text:p text:style-name="Text_20_body">Τα στοιχεία του διαγράμματος 1 προέρχονται από το Σύστημα Παρατηρητών Νοσηρότητας στην Πρωτοβάθμια Φροντίδα Υγείας (<text:span text:style-name="T1">Sentinel</text:span>), το οποίο την περίοδο 2014-2015 αναδιοργανώθηκε στο πλαίσιο του Επιχειρησιακού Προγράμματος «Ανάπτυξη Ανθρώπινου Δυναμικού» του Εθνικού Στρατηγικού Πλαισίου Αναφοράς (Ε.Σ.Π.Α) 2007-2013. Συγκεκριμένα τα στοιχεία προέρχονται από το δίκτυο των ιδιωτών ιατρών, το δίκτυο ιατρών Κέντρων Υγείας και το δίκτυο ιατρών Μονάδων Υγείας Π.Ε.Δ.Υ (πρώην Μονάδες Υγείας Ε.Ο.Π.Υ.Υ). Μέσω του Συστήματος <text:span text:style-name="T1">Sentinel</text:span> καταγράφεται δειγματοληπτικά η εξέλιξη της συχνότητας ορισμένων νοσημάτων με βάση κλινικές διαγνώσεις. Σε αυτά περιλαμβάνεται και η γρίπη ή καλύτερα, οι κλινικές εκδηλώσεις που είναι συμβατές με γρίπη (γριπώδης συνδρομή). </text:p>
      <text:p text:style-name="Text_20_body">Τ<text:span text:style-name="T23">ο σύστημα sentinel, μέσω της αναδιοργάνωσης του, προσαρμόστηκε στις πληθυσμιακές αλλαγές και τις θεσμικές μεταβολές στην οργάνωση της Π.Φ.Υ στη χώρα τα τελευταία έτη και εναρμονίστηκε με επικαιροποιημένα ευρωπαϊκά και διεθνή πρότυπα-οδηγίες.</text:span></text:p>
      <text:p text:style-name="P35">Ως εκ τούτου, επισημαίνουμε ότι λόγω αλλαγών στις λειτουργικές παραμέτρους του Συστήματος <text:span text:style-name="T1">Sentinel</text:span> στο πλαίσιο του εκσυγχρονισμού του από την περίοδο 2014-2015, τα δεδομένα του δικτύου δεν θεωρούνται <text:span text:style-name="T41">άμεσα </text:span>συγκρίσιμα με αυτά των παρελθόντων ετών. </text:p>
      <text:p text:style-name="Text_20_body">Κατά την εβδομάδα \Sexpr{strsplit(rb$wklab, " ")[[1]][1]}<text:span text:style-name="T9"> </text:span>ο αριθμός των συμμετεχόντων ιατρών που απέστειλε κλινικά δεδομένα ανήλθε στους \Sexpr{plirotita_nuts[4,5]} και οι επισκέψεις για κάθε αιτία που αντιστοιχούν στους ιατρούς που δήλωσαν, ανήλθαν στις \Sexpr{prettyNum(subset(resGastroAll, yearweek==tgtweek)$totvis, big.mark=".")} στο σύνολο της χώρας.</text:p>
      <text:p text:style-name="Text_20_body"/>
      <text:p text:style-name="Heading_20_2"/>
      <text:p text:style-name="P41">Β. Εργαστηριακό σκέλος επιδημιολογικής επιτήρησης της γρίπης</text:p>
      <text:p text:style-name="Text_20_body"><text:span text:style-name="T9">Κατά την εβδομάδα \Sexpr{rb$wklab}</text:span> <text:span text:style-name="T9">στα 2 Εθνικά Εργαστήρια Αναφοράς Γρίπης (Τμήμα Ιολογίας, Ελληνικό Ινστιτούτο Παστέρ, και Β'Εργαστήριο Μικροβιολογίας, Ιατρική Σχολή Α.Π.Θ.) και στο Μικροβιολογικό Εργαστήριο του Ε.Κ.Π.Α,</text:span> ελέγχθηκαν για ιούς γρίπης συνολικά \Sexpr{rowSums(rb$summSwab)["Total"]} κλινικά δείγματα και συγκεκριμένα \Sexpr{rb$summSwab["Total", "nosok"]} από νοσοκομεία και \Sexpr{rb$summSwab["Total", "sentinel"]} από τα δίκτυα <text:span text:style-name="T1">Sentinel</text:span>.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c("A.H3N2.", "A.H1N1.pdm09"))} ανήκαν στον υπότυπο Α(Η3Ν2) και το \Sexpr{rb$summF(“A.H1N1.pdm09”, c("A.H3N2.", "A.H1N1.pdm09"))} στον υπότυπο Α(Η1Ν1)<text:span text:style-name="T1">pdm09</text:span>. </text:p>
      <text:p text:style-name="Text_20_body">Από την εβδομάδα 40/\Sexpr{tgtyear} έως και την εβδομάδα \Sexpr{strsplit(rb$wklab, " ")[[1]][1]} έχουν ελεγχθεί συνολικά \Sexpr{rowSums(rb$summSwabTot)["Total"]} κλινικά δείγματα και συγκεκριμένα \Sexpr{rb$summSwabTot["Total", "nosok"]} από νοσοκομεία και \Sexpr{rb$summSwabTot["Total", "sentinel"]} από τα δίκτυα <text:span text:style-name="T1">Sentinel</text:span>. Τα \Sexpr{rb$summFtot("Positive")} εξ΄ αυτών ήταν θετικά για ιούς γρίπης και ειδικότερα τα \Sexpr{rb$summFtot(“Α”, "Positive")} ήταν τύπου Α και τα \Sexpr{rb$summFtot(“Β”, "Positive")} τύπου Β. Τα \Sexpr{sum(rb$summSwabTot[8:9,], na.rm=TRUE)} στελέχη τύπου Α υποτυποποιήθηκαν και από αυτά τα \Sexpr{rb$summFtot(“A.H3N2.”, c("A.H3N2.", "A.H1N1.pdm09"))} ανήκαν στον υπότυπο Α(Η3Ν2) και τα \Sexpr{rb$summFtot(“A.H1N1.pdm09”, c("A.H3N2.", "A.H1N1.pdm09"))} <text:s/>στον υπότυπο Α(Η1Ν1)<text:span text:style-name="T1">pdm09</text:span>. </text:p>
      <text:p text:style-name="Text_20_body"/>
      <text:p text:style-name="Heading_20_4">Διάγραμμα <text:span text:style-name="T32">3</text:span>:<text:tab/>Συνολικός αριθμός φαρυγγικών δειγμάτων και απομονωθέντων στελεχών ιού γρίπης στα Εργαστήρια Αναφοράς Γρίπης. Σύνολο χώρας, περίοδος γρίπης \Sexpr{paste(tgtyear, “–”, tgtyear+1)}.</text:p>
      <text:p text:style-name="Text_20_body">&lt;&lt;diag<text:span text:style-name="T32">3</text:span>, echo = FALSE, <text:span text:style-name="T13">fig=TRUE, </text:span>results = <text:span text:style-name="T14">hide</text:span>&gt;&gt;=</text:p>
      <text:p text:style-name="P15">imgDefs &lt;- getImageDefs()</text:p>
      <text:p text:style-name="P15">imgDefs$plotHeight &lt;- 1680</text:p>
      <text:p text:style-name="P15">imgDefs$plotWidth &lt;- 2800</text:p>
      <text:p text:style-name="P15">imgDefs$dispHeight &lt;- “4.5”</text:p>
      <text:p text:style-name="P15">imgDefs$dispWidth &lt;- <text:span text:style-name="T21">gsub(",", ".", as.character(4.5*2800/1680), fixed=TRUE)</text:span></text:p>
      <text:p text:style-name="P15">imgDefs$args &lt;- list(res=288)</text:p>
      <text:p text:style-name="P15">setImageDefs(imgDefs)</text:p>
      <text:p text:style-name="P9"/>
      <text:p text:style-name="P36">par(family=”Fira Sans”)</text:p>
      <text:p text:style-name="P32">swabPlot()</text:p>
      <text:p text:style-name="Text_20_body">@</text:p>
      <text:p text:style-name="Text_20_body"/>
      <text:p text:style-name="P41">Γ. Επιτήρηση σοβαρών κρουσμάτων εργαστηριακά επιβεβαιωμένης γρίπης με ή χωρίς νοσηλεία σε Μονάδα Εντατικής Θεραπείας (Μ.Ε.Θ)</text:p>
      <text:p text:style-name="Text_20_body">Από την εβδομάδα 40/\Sexpr{tgtyear} έως και την εβδομάδα \Sexpr{strsplit(rb$wklab, " ")[[1]][1]}, στην Ελλάδα έχουν καταγραφεί \Sexpr{nrow(rb$meth) + nrow(rb$outOfMeth)} σοβαρά κρούσματα εργαστηριακά επιβεβαιωμένης γρίπης, εκ των οποίων τα \Sexpr{nrow(rb$meth)} νοσηλεύτηκαν σε Μ.Ε.Θ (Πίνακας 1, Διάγραμμα <text:span text:style-name="T32">4</text:span>). </text:p>
      <text:p text:style-name="Text_20_body"><text:span text:style-name="T9">Όσον αφορά στα </text:span><text:span text:style-name="T16">κρούσματα με νοσηλεία σε Μ.Ε.Θ.</text:span><text:span text:style-name="T17">:</text:span><text:span text:style-name="T9"> </text:span>Πρόκειται για \Sexpr{sum(rb$meth$sex=="Α", na.rm=TRUE)} άνδρες <text:s/>και \Sexpr{sum(rb$meth$sex=="Θ", na.rm=TRUE)} γυναίκες, με εύρος ηλικιών από \Sexpr{min(rb$meth$age, na.rm=TRUE)} έως \Sexpr{max(rb$meth$age, na.rm=TRUE)} έτη, μέση ηλικία \Sexpr{round(mean(rb$meth$age, na.rm=TRUE), 1)} έτη και διάμεση \Sexpr{if (is.na(median(rb$meth$age, na.rm=TRUE))) “NA” else median(rb$meth$age, na.rm=TRUE)} έτη. Τα \Sexpr{rb$showPct(sum(rb$meth$flutypef %in% c("A", "A(H1N1)pdm09", "A(H3N2)"), na.rm=T), nrow(rb$meth))} από τα προαναφερόμενα κρούσματα οφείλονται στον ιό γρίπης τύπου Α, τα \Sexpr{rb$showPct(sum(rb$meth$flutypef=="B", na.rm=T), nrow(rb$meth))} στον ιό γρίπης τύπου Β, ενώ σε \Sexpr{rb$showPct(sum(rb$meth$flutypef=="χωρίς τύπο", na.rm=T), nrow(rb$meth))} κρούσματα δεν έχει τυποποιηθεί ο ιός της γρίπης. Τα \Sexpr{sum(rb$meth$flutypef %in% c("A(H1N1)pdm09", "A(H3N2)"), na.rm=T)} από τα στελέχη τύπου Α που απομονώθηκαν από τα ανωτέρω κρούσματα υποτυποποιήθηκαν και εξ΄ αυτών τα \Sexpr{rb$showPct(sum(rb$meth$flutypef=="A(H3N2)", na.rm=T), sum(rb$meth$flutypef %in% c("A(H1N1)pdm09", "A(H3N2)"), na.rm=T))} ανήκαν στον υπότυπο Α(Η3Ν2) και τα \Sexpr{rb$showPct(sum(rb$meth$flutypef=="A(H1N1)pdm09", na.rm=T), sum(rb$meth$flutypef %in% c("A(H1N1)pdm09", "A(H3N2)"), na.rm=T))} στον υπότυπο Α(Η1Ν1)<text:span text:style-name="T1">pdm</text:span>09. (Διάγραμμα 4). </text:p>
      <text:p text:style-name="Text_20_body">Τα \Sexpr{rb$showPct(sum(rb$meth$HRCG, na.rm=TRUE), nrow(rb$meth))} από τα \Sexpr{nrow(rb$meth)} προαναφερόμενα σοβαρά κρούσματα με νοσηλεία σε Μ.Ε.Θ ανήκουν σε κλινική ομάδα υψηλού κινδύνου για την οποία συστήνεται εμβολιασμός για την εποχική γρίπη, σύμφωνα με τη σχετική εγκύκλιο του Υ.Υ, και εξ'αυτών εμβολιασμένοι ήταν οι \Sexpr{rb$showPct(sum(rb$meth$HRCG &amp; rb$meth$vacc, na.rm=TRUE), sum(rb$meth$HRCG, na.rm=TRUE))}.</text:p>
      <text:p text:style-name="Text_20_body"><text:span text:style-name="T9">Όσον αφορά στα </text:span><text:span text:style-name="T16">κρούσματα χωρίς νοσηλεία σε Μ.Ε.Θ.</text:span><text:span text:style-name="T17">:</text:span><text:span text:style-name="T9"> Πρόκειται για \Sexpr{sum(rb$outOfMeth$sex=="Α", na.rm=TRUE)} άνδρες <text:s/>και \Sexpr{sum(rb$outOfMeth$sex=="Θ", na.rm=TRUE)} γυναίκες, με εύρος ηλικιών από \Sexpr{min(rb$outOfMeth$age, na.rm=TRUE)} έως \Sexpr{max(rb$outOfMeth$age, na.rm=TRUE)} έτη, μέση ηλικία \Sexpr{round(mean(rb$outOfMeth$age, na.rm=TRUE), 1)} έτη και διάμεση \Sexpr{if (is.na(median(rb$outOfMeth$age, na.rm=TRUE))) “NA” else median(rb$outOfMeth$age, na.rm=TRUE)} έτη. Τα \Sexpr{rb$showPct(sum(rb$outOfMeth$flutypef %in% c("A", "A(H1N1)pdm09", "A(H3N2)"), na.rm=T), nrow(rb$outOfMeth))} από τα προαναφερόμενα κρούσματα οφείλονται στον ιό γρίπης τύπου Α, τα \Sexpr{rb$showPct(sum(rb$outOfMeth$flutypef=="B", na.rm=T), nrow(rb$outOfMeth))} στον ιό γρίπης τύπου Β, ενώ σε \Sexpr{rb$showPct(sum(rb$outOfMeth$flutypef=="χωρίς τύπο", na.rm=T), nrow(rb$outOfMeth))} κρούσματα δεν έχει τυποποιηθεί ο ιός της γρίπης. Τα \Sexpr{sum(rb$outOfMeth$flutypef %in% </text:span><text:soft-page-break/><text:span text:style-name="T9">c("A(H1N1)pdm09", "A(H3N2)"), na.rm=T)} από τα στελέχη τύπου Α που απομονώθηκαν από τα ανωτέρω κρούσματα υποτυποποιήθηκαν και εξ΄ αυτών τα \Sexpr{rb$showPct(sum(rb$outOfMeth$flutypef=="A(H3N2)", na.rm=T), sum(rb$outOfMeth$flutypef %in% c("A(H1N1)pdm09", "A(H3N2)"), na.rm=T))} ανήκαν στον υπότυπο Α(Η3Ν2) και τα \Sexpr{rb$showPct(sum(rb$outOfMeth$flutypef=="A(H1N1)pdm09", na.rm=T), sum(rb$outOfMeth$flutypef %in% c("A(H1N1)pdm09", "A(H3N2)"), na.rm=T))} στον υπότυπο Α(Η1Ν1)pdm09. Τα \Sexpr{rb$showPct(sum(rb$outOfMeth$HRCG, na.rm=TRUE), nrow(rb$outOfMeth))} από τα \Sexpr{nrow(rb$outOfMeth)} προαναφερόμενα σοβαρά κρούσματα χωρίς νοσηλεία σε Μ.Ε.Θ ανήκουν σε κλινική ομάδα υψηλού κινδύνου για την οποία συστήνεται εμβολιασμός για την εποχική γρίπη σύμφωνα με τη σχετική εγκύκλιο του Υ.Υ, και εξ'αυτών εμβολιασμένοι ήταν οι \Sexpr{rb$showPct(sum(rb$outOfMeth$HRCG &amp; rb$outOfMeth$vacc, na.rm=TRUE), sum(rb$outOfMeth$HRCG, na.rm=TRUE))}.</text:span></text:p>
      <text:p text:style-name="Text_20_body"><text:span text:style-name="T9">Από την εβδομάδα 40/\Sexpr{tgtyear} έως και την εβδομάδα \Sexpr{strsplit(rb$wklab, " ")[[1]][1]} στην Ελλάδα έχουν καταγραφεί \Sexpr{nrow(rb$totDeaths)} θάνατοι από εργαστηριακά επιβεβαιωμένη γρίπη, εκ των οποίων οι \Sexpr{sum(rb$totDeaths$meth, na.rm=T)} αφορούν σε κρούσματα που χρειάστηκαν νοσηλεία στη Μ.Ε.Θ και \Sexpr{sum(!rb$totDeaths$meth, na.rm=T)} σε κρούσματα που δεν νοσηλεύτηκαν σε Μ.Ε.Θ (Πίνακας 1, Διάγραμμα 4). Πρόκειται για \Sexpr{sum(rb$totDeaths$sex=="Α", na.rm=T)} άνδρες και \Sexpr{sum(rb$totDeaths$sex=="Θ",na.rm=T)} γυναίκες, με εύρος ηλικιών από \Sexpr{min(rb$totDeaths$age, na.rm=TRUE)} έως \Sexpr{max(rb$totDeaths$age, na.rm=TRUE)} έτη, </text:span>μέση ηλικία \Sexpr{round(mean(rb$totDeaths$age, na.rm=TRUE),1)} έτη και διάμεση \Sexpr{if (is.na(median(rb$totDeaths$age, na.rm=TRUE))) "NA" else median(rb$totDeaths$age, na.rm=TRUE)} έτη<text:span text:style-name="T9">. Από τα \Sexpr{rb$showPct(sum(rb$totDeaths$flutypef %in% c("A(H3N2)", "A(H1N1)pdm09", "A"), na.rm=TRUE), nrow(rb$totDeaths))} κρούσματα απομονώθηκε ιός γρίπης τύπου Α, από τα \Sexpr{rb$showPct(sum(rb$totDeaths$flutypef=="B", na.rm=TRUE), nrow(rb$totDeaths))} ιός γρίπης τύπου Β, ενώ σε \Sexpr{rb$showPct(sum(rb$totDeaths$flutypef=="χωρίς τύπο", na.rm=TRUE), nrow(rb$totDeaths))} <text:s/>δεν τυποποιήθηκε το στέλεχος της γρίπης. Τα \Sexpr{sum(rb$totDeaths$flutypef %in% c("A(H3N2)", "A(H1N1)pdm09"), na.rm=TRUE)} στελέχη γρίπης τύπου Α που απομονώθηκαν από τα προαναφερόμενα κρούσματα υποτυποποιήθηκαν και εξ΄ αυτών \Sexpr{rb$showPct(sum(rb$totDeaths$flutypef=="A(H1N1)pdm09", na.rm=TRUE), sum(rb$totDeaths$flutypef %in% c("A(H3N2)", "A(H1N1)pdm09"), na.rm=TRUE))} ανήκαν στον υπότυπο Α </text:span>(Η1Ν1)<text:span text:style-name="T1">pdm</text:span>09<text:span text:style-name="T9"> και \Sexpr{rb$showPct(sum(rb$totDeaths$flutypef=="A(H3N2)", na.rm=TRUE), sum(rb$totDeaths$flutypef %in% c("A(H3N2)", "A(H1N1)pdm09"), na.rm=TRUE))} στον υπότυπο Α(Η3Ν2). Τα \Sexpr{rb$showPct(sum(rb$totDeaths$HRCG, na.rm=T), nrow(rb$totDeaths))} από τα \Sexpr{nrow(rb$totDeaths)} προαναφερθέντα κρούσματα ανήκαν σε κλινική ομάδα υψηλού κινδύνου για την οποία συστήνεται εμβολιασμός για την εποχική γρίπη σύμφωνα με τη σχετική εγκύκλιο του Υ.Υ, και εξ'αυτών εμβολιασμένοι ήταν οι \Sexpr{rb$showPct(sum(rb$totDeaths$HRCG &amp; rb$totDeaths$vacc, na.rm=TRUE), sum(rb$totDeaths$HRCG, na.rm=TRUE))}.</text:span></text:p>
      <text:p text:style-name="Text_20_body"/>
      <text:p text:style-name="Heading_20_4"><text:soft-page-break/>Πίνακας 1: <text:tab/>Περιστατικά με νοσηλεία σε Μ.Ε.Θ και θάνατοι (σε Μ.Ε.Θ &amp; εκτός Μ.Ε.Θ) από εργαστηριακά επιβεβαιωμένη γρίπη. Σύνολο Ελλάδας, από εβδομάδα 40/<text:span text:style-name="T1">\Sexpr{tgtyear}</text:span> έως εβδομάδα \Sexpr{rb$wklab}. </text:p>
      <table:table table:name="Πίνακας1" table:style-name="Πίνακας1">
        <table:table-column table:style-name="Πίνακας1.A"/>
        <table:table-column table:style-name="Πίνακας1.B"/>
        <table:table-row table:style-name="Πίνακας1.1">
          <table:table-cell table:style-name="Πίνακας1.A1" office:value-type="string">
            <text:p text:style-name="Text_20_body">Νέα κρουσμάτα σε Μ.Ε.Θ. που δηλώθηκαν την εβδομάδα \Sexpr{rb$wklab}</text:p>
          </table:table-cell>
          <table:table-cell table:style-name="Πίνακας1.B1" office:value-type="string">
            <text:p text:style-name="Text_20_body">\Sexpr{nrow(subset(rb$meth, yearweek == tgtweek))}</text:p>
          </table:table-cell>
        </table:table-row>
        <table:table-row table:style-name="Πίνακας1.1">
          <table:table-cell table:style-name="Πίνακας1.A2" office:value-type="string">
            <text:p text:style-name="P30">Σύνολο νοσηλευθέντων σε Μ.Ε.Θ. έως \Sexpr{format(isoweekStart(tgtweek)+6,format="%d/%m/%Y")}</text:p>
          </table:table-cell>
          <table:table-cell table:style-name="Πίνακας1.B2" office:value-type="string">
            <text:p text:style-name="P30">\Sexpr{nrow(rb$meth)}</text:p>
          </table:table-cell>
        </table:table-row>
        <table:table-row table:style-name="Πίνακας1.1">
          <table:table-cell table:style-name="Πίνακας1.A1" office:value-type="string">
            <text:p text:style-name="Text_20_body">Νέοι θάνατοι που δηλώθηκαν την εβδομάδα \Sexpr{rb$wklab}</text:p>
          </table:table-cell>
          <table:table-cell table:style-name="Πίνακας1.B1" office:value-type="string">
            <text:p text:style-name="Text_20_body">\Sexpr{nrow(subset(rb$totDeaths, yearweek == tgtweek))}</text:p>
          </table:table-cell>
        </table:table-row>
        <table:table-row table:style-name="Πίνακας1.1">
          <table:table-cell table:style-name="Πίνακας1.A2" office:value-type="string">
            <text:p text:style-name="P30">Συνολικός αριθμός θανάτων έως \Sexpr{format(isoweekStart(tgtweek)+6,format="%d/%m/%Y")}</text:p>
          </table:table-cell>
          <table:table-cell table:style-name="Πίνακας1.B2" office:value-type="string">
            <text:p text:style-name="P30">\Sexpr{nrow(rb$totDeaths)}</text:p>
          </table:table-cell>
        </table:table-row>
      </table:table>
      <text:p text:style-name="P46"/>
      <text:p text:style-name="Text_20_body"/>
      <text:p text:style-name="P44"><text:span text:style-name="T9">Διάγραμμα </text:span><text:span text:style-name="T10">4</text:span><text:span text:style-name="T9">: <text:tab/>Αριθμός εισαγωγών σε Μ.Ε.Θ. ανά εβδομάδα, σε ασθενείς με εργαστηριακά επιβεβαιωμένη γρίπη.</text:span> Σύνολο Ελλάδας, από εβδομάδα 40/\Sexpr{tgtyear} έως εβδομάδα \Sexpr{rb$wklab}. Συνολικός αριθμός δηλωθέντων κρουσμάτων έως και την εβδομάδα \Sexpr{strsplit(rb$wklab," ")[[1]][1]}: \Sexpr{nrow(rb$meth)}</text:p>
      <text:p text:style-name="P3">&lt;&lt;diag<text:span text:style-name="T32">4</text:span>, echo = FALSE, fig=TRUE, results = hide&gt;&gt;=</text:p>
      <text:p text:style-name="P3">imgDefs &lt;- getImageDefs()</text:p>
      <text:p text:style-name="P3">imgDefs$plotHeight &lt;- 1<text:span text:style-name="T20">3</text:span>00</text:p>
      <text:p text:style-name="P3">imgDefs$plotWidth &lt;- 2800</text:p>
      <text:p text:style-name="P5">imgDefs$dispHeight &lt;- <text:span text:style-name="T21">gsub(",", ".", as.character(7.5*13/28), fixed=TRUE)</text:span></text:p>
      <text:p text:style-name="P3">imgDefs$dispWidth &lt;- “7.5”</text:p>
      <text:p text:style-name="P3">imgDefs$args &lt;- list(res=288)</text:p>
      <text:p text:style-name="P4">setImageDefs(imgDefs)</text:p>
      <text:p text:style-name="P24">par(mar=c(3.5,4,1,2), <text:span text:style-name="T25">family="Fira Sans"</text:span>)</text:p>
      <text:p text:style-name="P3">methPlot()</text:p>
      <text:p text:style-name="P3">@</text:p>
      <text:p text:style-name="P3"/>
      <text:p text:style-name="Heading_20_4"><text:span text:style-name="T9">Διάγραμμα </text:span><text:span text:style-name="T11">5</text:span><text:span text:style-name="T9">: Αριθμός θανάτων (σε Μ.Ε.Θ. &amp; εκτός Μ.Ε.Θ) ανά εβδομάδα, σε ασθενείς με εργαστηριακά επιβεβαιωμένη γρίπη. </text:span>Σύνολο Ελλάδας, από εβδομάδα 40/\Sexpr{tgtyear} έως εβδομάδα \Sexpr{rb$wklab}. Συνολικός αριθμός θανάτων έως και την εβδομάδα \Sexpr{strsplit(rb$wklab," ")[[1]][1]}: \Sexpr{nrow(rb$totDeaths)}</text:p>
      <text:p text:style-name="P3">&lt;&lt;diag<text:span text:style-name="T32">6</text:span>, echo = FALSE, fig=TRUE, results = hide&gt;&gt;=</text:p>
      <text:p text:style-name="P24">par(mar=c(3.5,4,1,2), <text:span text:style-name="T25">family="Fira Sans"</text:span>)</text:p>
      <text:p text:style-name="P3">deathPlot()</text:p>
      <text:p text:style-name="P3">@</text:p>
      <text:p text:style-name="P44"><text:span text:style-name="T9">Διάγραμμα </text:span><text:span text:style-name="T11">6</text:span><text:span text:style-name="T9">: Ηλικιακή κατανομή εισαχθέντων σε Μ.Ε.Θ. με εργαστηριακά επιβεβαιωμένη γρίπη και ασθενών που κατέληξαν σε Μ.Ε.Θ ή εκτός Μ.Ε.Θ. </text:span>Σύνολο Ελλάδας, από εβδομάδα 40/\Sexpr{tgtyear} έως εβδομάδα \Sexpr{rb$wklab}.</text:p>
      <text:p text:style-name="P34">&lt;&lt;diag<text:span text:style-name="T19">5</text:span>, echo = FALSE, fig=TRUE, results = hide&gt;&gt;=</text:p>
      <text:p text:style-name="P16">imgDefs &lt;- getImageDefs()</text:p>
      <text:p text:style-name="P16">imgDefs$plotHeight &lt;- 1680</text:p>
      <text:p text:style-name="P16">imgDefs$plotWidth &lt;- 2800</text:p>
      <text:p text:style-name="P16">imgDefs$dispHeight &lt;- “4.5”</text:p>
      <text:p text:style-name="P17">imgDefs$dispWidth &lt;- <text:span text:style-name="T21">gsub(",", ".", as.character(4.5*2800/1680), fixed=TRUE)</text:span></text:p>
      <text:p text:style-name="P16">imgDefs$args &lt;- list(res=288)</text:p>
      <text:p text:style-name="P18">setImageDefs(imgDefs)</text:p>
      <text:p text:style-name="P22">par(family=”Fira Sans”)</text:p>
      <text:p text:style-name="P19">methDeathAgePlot()</text:p>
      <text:p text:style-name="P34">@</text:p>
      <text:p text:style-name="Text_20_body"/>
      <text:p text:style-name="P41">Δ. Σύστημα επιδημιολογικής επιτήρησης της θνησιμότητας</text:p>
      <text:p text:style-name="Text_20_body">Παρουσιάζονται εδώ τα κύρια ευρήματα από την επιδημιολογική επιτήρηση της θνησιμότητας στην Ελλάδα, με επικέντρωση στην έγκαιρη ανίχνευση θνησιμότητας που υπερβαίνει την αναμενόμενη (excess mortality).</text:p>
      <text:p text:style-name="Text_20_body">Κατά την εβδομάδα \Sexpr{rb$wklab}, η θνησιμότητα στην Ελλάδα από όλες τις αιτίες κυμάνθηκε στα πλαίσια της αναμενόμενης (Διάγραμμα <text:span text:style-name="T32">7</text:span>).</text:p>
      <text:p text:style-name="Text_20_body"/>
      <text:p text:style-name="Heading_20_4">Διάγραμμα <text:span text:style-name="T32">7</text:span>: <text:tab/>Παρατηρούμενος και αναμενόμενος αριθμός θανάτων κατά εβδομάδα στις περιοχές της Ελλάδας που μετέχουν στο σύστημα επιτήρησης. Εβδομάδα <text:span text:style-name="T6">2</text:span><text:span text:style-name="T4">0</text:span>/20<text:span text:style-name="T30">13</text:span> έως εβδομάδα \Sexpr{strsplit(rb$wklab," ")[[1]][1]}.</text:p>
      <text:p text:style-name="P6">&lt;&lt;diag<text:span text:style-name="T32">7</text:span>, echo = FALSE, fig=TRUE, results = hide&gt;&gt;=</text:p>
      <text:p text:style-name="P23">par(family=”Fira Sans”)</text:p>
      <text:p text:style-name="P6"><text:span text:style-name="T22">momo</text:span>Plot()</text:p>
      <text:p text:style-name="P6">@</text:p>
      <text:p text:style-name="Text_20_body"/>
      <text:p text:style-name="Λεζάντα1">Σημειώσεις: </text:p>
      <text:list xml:id="list7592549268122199751" text:style-name="WWNum3">
        <text:list-item>
          <text:p text:style-name="P52">Ο παρατηρούμενος αριθμός θανάτων των τελευταίων 4 εβδομάδων διορθώνεται λαμβάνοντας υπόψη την υπολογιζόμενη χρονική καθυστέρηση στις δηλώσεις θανάτων και αναπροσαρμόζεται κάθε εβδομάδα με βάση τα νέα δεδομένα.</text:p>
        </text:list-item>
      </text:list>
      <text:p text:style-name="Text_20_body"/>
      <text:p text:style-name="P43">Πηγή πληροφοριών για το σύστημα επιδημιολογικής επιτήρησης της θνησιμότητας από όλες τις αιτίες</text:p>
      <text:p text:style-name="P37">Η καταγραφή των θανάτων γίνεται από τα Ληξιαρχεία <text:span text:style-name="T26">των</text:span> δήμων της χώρας σε σχεδόν πραγματικό χρόνο και αφορά τους θανάτους που <text:span text:style-name="T26">δηλώθηκαν</text:span> κατά την εβδομάδα αναφοράς.</text:p>
      <text:p text:style-name="P37">Τα δεδομένα <text:span text:style-name="T26">αφορούν το </text:span><text:span text:style-name="T28">σύνολο της χώρας, και </text:span><text:span text:style-name="T27">προέρχονται</text:span> από το Πληροφοριακό Σύστημα Διαχείρισης Ληξιαρχικών Πράξεων (ΠΣ ΛΗΠ) που λειτουργεί από το Μάιο του 2013 στη Διεύθυνση Μηχανοργάνωσης &amp; ΗΕΣ της Γεν. Δ/νσης Αναπτυξιακών Προγραμμάτων του Υπουργείου Εσωτερικών. Στο πλαίσιο αυτό, το ΚΕ.ΕΛ.Π.ΝΟ έχει οριστεί από το Υπουργείο Εσωτερικών ως διαπιστευμένος φορέας. <text:s/></text:p>
      <text:p text:style-name="Text_20_body">Το σύστημα επιδημιολογικής επιτήρησης της θνησιμότητας από όλες τις αιτίες εφαρμόζεται στο πλαίσιο του προγράμματος European Mortality Monitoring (Euro-MOMO), στο οποίο συμμετέχουν και άλλες 21 ευρωπαϊκές χώρες. Το συντονισμό του προγράμματος στην Ελλάδα έχει το Τμήμα Επιδημιολογικής Επιτήρησης και Παρέμβασης του ΚΕ.ΕΛ.Π.ΝΟ.</text:p>
      <text:p text:style-name="Text_20_body"/>
      <text:p text:style-name="Text_20_body"/>
      <text:p text:style-name="Heading_20_2">Δ. Η δραστηριότητα της γρίπης στην Ευρώπη</text:p>
      <text:p text:style-name="P38">Στην ιστοσελίδα <text:a xlink:type="simple" xlink:href="http://flunewseurope.org/" text:style-name="Internet_20_link" text:visited-style-name="Visited_20_Internet_20_Link">http://flunewseurope.org/</text:a> μπορείτε να βρείτε αναλυτικά τις τελευταίες πληροφορίες που συλλέγονται από το Ευρωπαϊκό Κέντρο Πρόληψης και Ελέγχου Νοσημάτων (ECDC) και τον Περιφερειακό Γραφείο Ευρώπης του Παγκόσμιου Οργανισμού Υγείας σχετικά με τη δραστηριότητα της γρίπης στην Ευρώπη.</text:p>
      <text:p text:style-name="Text_20_body"><text:span text:style-name="T31">Κ</text:span>ατά την εβδομάδα \Sexpr{rb$wklab}, <text:span text:style-name="T31">ΧΧ χώρες ανέφεραν χαμηλή δραστηριότητα της γρίπης.</text:span></text:p>
      <text:p text:style-name="Text_20_body"/>
      <text:p text:style-name="P47"/>
      <text:p text:style-name="P50">Η παρούσα έκθεση περιλαμβάνει στοιχεία που αφορούν την εβδομάδα \Sexpr{rb$wklab} και δηλώθηκαν στο ΚΕΕΛΠΝΟ μέχρι την \Sexpr{formatDate(isoweekStart(tgtweek)+10)}, ώρα 13: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Mangal1" svg:font-family="Mangal" style:font-family-generic="swiss"/>
    <style:font-face style:name="Fira Sans1" svg:font-family="'Fira Sans'" style:font-adornments="Έντονα" style:font-pitch="variable"/>
    <style:font-face style:name="Fira Sans" svg:font-family="'Fira Sans'" style:font-adornments="Κανονικά"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reeSans1" svg:font-family="FreeSans" style:font-adornments="µεσαία" style:font-family-generic="swiss" style:font-pitch="variable"/>
    <style:font-face style:name="FreeSans" svg:font-family="FreeSans" style:font-adornments="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ar" style:country-asian="SA" style:font-name-complex="Calibri1" style:font-family-complex="Calibri" style:font-family-generic-complex="system" style:font-pitch-complex="variable"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349cm" loext:contextual-spacing="false" fo:line-height="150%" fo:text-align="justify" style:justify-single-word="false" style:page-number="auto" style:writing-mode="lr-tb"/>
      <style:text-properties style:font-name="Fira Sans" fo:font-family="'Fira Sans'" style:font-style-name="Κανονικά" style:font-pitch="variable" fo:font-size="10pt" fo:font-weight="normal" style:font-name-asian="Times New Roman1" style:font-family-asian="'Times New Roman'" style:font-family-generic-asian="system" style:font-pitch-asian="variable" style:font-size-asian="10pt" style:font-weight-asian="bold" style:font-name-complex="Tahoma1" style:font-family-complex="Tahoma" style:font-family-generic-complex="system" style:font-pitch-complex="variable" style:font-size-complex="12pt" style:font-weight-complex="bold"/>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Heading_20_1" style:display-name="Heading 1" style:family="paragraph" style:parent-style-name="Standard" style:default-outline-level="1" style:list-style-name="" style:class="text" style:master-page-name="">
      <style:paragraph-properties fo:margin-left="0cm" fo:margin-right="-0.852cm" fo:margin-top="0cm" fo:margin-bottom="0cm" loext:contextual-spacing="false" fo:line-height="100%" fo:text-align="center" style:justify-single-word="false" fo:text-indent="-0.751cm" style:auto-text-indent="false" style:page-number="auto" fo:keep-with-next="always"/>
      <style:text-properties style:font-name="FreeSans" fo:font-family="FreeSans" style:font-style-name="Έντονα" style:font-family-generic="swiss" style:font-pitch="variable" fo:font-size="14pt" fo:font-weight="600" style:font-weight-asian="bold" style:font-name-complex="Arial2" style:font-family-complex="Arial" style:font-family-generic-complex="system" style:font-pitch-complex="variable" style:font-weight-complex="bold"/>
    </style:style>
    <style:style style:name="Heading_20_8" style:display-name="Heading 8" style:family="paragraph" style:parent-style-name="Standard" style:default-outline-level="8" style:list-style-name="" style:class="text">
      <style:paragraph-properties fo:margin-left="2.54cm" fo:margin-right="0cm" fo:margin-top="0.423cm" fo:margin-bottom="0.106cm" loext:contextual-spacing="false" fo:line-height="100%" fo:text-indent="-2.54cm" style:auto-text-indent="false">
        <style:tab-stops>
          <style:tab-stop style:position="2.54cm"/>
        </style:tab-stops>
      </style:paragraph-properties>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Λεζάντα1" style:family="paragraph" style:parent-style-name="Standard" style:default-outline-level="" style:master-page-name="">
      <style:paragraph-properties fo:margin-left="2cm" fo:margin-right="0cm" fo:margin-top="0cm" fo:margin-bottom="0.63cm" loext:contextual-spacing="false" fo:text-indent="-2cm" style:auto-text-indent="false" style:page-number="auto" text:number-lines="false" text:line-number="0" style:writing-mode="lr-tb">
        <style:tab-stops/>
      </style:paragraph-properties>
      <style:text-properties style:font-name="Fira Sans" fo:font-family="'Fira Sans'" style:font-style-name="Κανονικά" style:font-pitch="variable" fo:font-size="8pt" fo:font-style="normal" fo:font-weight="normal" style:font-size-asian="12pt" style:font-style-asian="italic" style:font-name-complex="Mangal" style:font-family-complex="Mangal"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false" fo:line-height="100%" fo:text-indent="0cm" style:auto-text-indent="false"/>
      <style:text-properties style:font-name="Times New Roman" fo:font-family="'Times New Roman'" style:font-family-generic="roman" style:font-pitch="variable"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style:paragraph-properties fo:text-align="end" style:justify-single-word="false" style:page-number="auto">
        <style:tab-stops>
          <style:tab-stop style:position="7.325cm" style:type="center"/>
          <style:tab-stop style:position="14.651cm" style:type="right"/>
        </style:tab-stops>
      </style:paragraph-properties>
      <style:text-properties style:font-name="FreeSans1" fo:font-family="FreeSans" style:font-style-name="µεσαία" style:font-family-generic="swiss" style:font-pitch="variable" fo:font-weight="600"/>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Style-1" style:family="paragraph" style:default-outline-level="">
      <style:paragraph-properties fo:text-align="start" style:justify-single-word="false" fo:orphans="2" fo:widows="2" fo:hyphenation-ladder-count="no-limit" style:writing-mode="lr-tb"/>
      <style:text-properties style:font-name-asian="Arial2" style:font-family-asian="Arial" style:font-family-generic-asian="system" style:font-pitch-asian="variable" style:language-asian="ar" style:country-asian="SA" style:font-name-complex="Calibri1" style:font-family-complex="Calibri" style:font-family-generic-complex="system" style:font-pitch-complex="variable" fo:hyphenate="false" fo:hyphenation-remain-char-count="2" fo:hyphenation-push-char-count="2"/>
    </style:style>
    <style:style style:name="Body_20_Text_20_2" style:display-name="Body Text 2" style:family="paragraph" style:parent-style-name="Standard" style:default-outline-level="">
      <style:paragraph-properties fo:margin-top="0cm" fo:margin-bottom="0.212cm" loext:contextual-spacing="false" fo:line-height="200%"/>
      <style:text-properties style:font-name-asian="Times New Roman1" style:font-family-asian="'Times New Roman'" style:font-family-generic-asian="system" style:font-pitch-asian="variable"/>
    </style:style>
    <style:style style:name="Default" style:family="paragraph" style:default-outline-level="">
      <style:paragraph-properties fo:text-align="start" style:justify-single-word="false" fo:orphans="2" fo:widows="2" style:writing-mode="lr-tb"/>
      <style:text-properties fo:color="#000000" style:font-name="Tahoma" fo:font-family="Tahoma" style:font-family-generic="roman" style:font-pitch="variable" fo:font-size="12pt" style:font-size-asian="12pt" style:font-name-complex="Tahoma1" style:font-family-complex="Tahoma"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fo:hyphenate="tru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master-page-name="">
      <style:paragraph-properties fo:margin-top="0cm" fo:margin-bottom="0.42cm" loext:contextual-spacing="false" style:page-number="auto" style:writing-mode="lr-tb"/>
      <style:text-properties style:font-name="Fira Sans1" fo:font-family="'Fira Sans'" style:font-style-name="Έντονα" style:font-pitch="variable" fo:font-size="11pt" fo:font-style="normal" fo:font-weight="bold"/>
    </style:style>
    <style:style style:name="Heading_20_3" style:display-name="Heading 3" style:family="paragraph" style:parent-style-name="Heading" style:class="text">
      <style:paragraph-properties fo:margin-top="0cm" fo:margin-bottom="0.42cm" loext:contextual-spacing="false" style:writing-mode="lr-tb"/>
      <style:text-properties style:font-name="Fira Sans1" fo:font-family="'Fira Sans'" style:font-style-name="Έντονα" style:font-pitch="variable" fo:font-size="10pt" fo:font-weight="bold"/>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master-page-name="">
      <style:paragraph-properties fo:margin-left="2.499cm" fo:margin-right="0cm" fo:margin-top="0.21cm" fo:margin-bottom="0.21cm" loext:contextual-spacing="false" fo:line-height="100%" fo:text-indent="-2.499cm" style:auto-text-indent="false" style:page-number="auto" style:writing-mode="lr-tb">
        <style:tab-stops/>
      </style:paragraph-properties>
      <style:text-properties style:font-name="Fira Sans1" fo:font-family="'Fira Sans'" style:font-style-name="Έντονα" style:font-pitch="variable" fo:font-size="10pt" fo:font-weight="bold"/>
    </style:style>
    <style:style style:name="Heading_20_5" style:display-name="Heading 5" style:family="paragraph" style:parent-style-name="Heading" style:class="text">
      <style:paragraph-properties style:writing-mode="lr-tb"/>
      <style:text-properties style:font-name="Fira Sans" fo:font-family="'Fira Sans'" style:font-style-name="Κανονικά" style:font-pitch="variable"/>
    </style:style>
    <style:style style:name="Default_20_Paragraph_20_Font" style:display-name="Default Paragraph Font" style:family="text"/>
    <style:style style:name="WW8Num2z0" style:family="text">
      <style:text-properties style:font-name="Symbol" fo:font-family="Symbol" style:font-family-generic="roman" style:font-pitch="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style>
    <style:style style:name="Προεπιλεγμένη_20_γραμματοσειρά1" style:display-name="Προεπιλεγμένη γραμματοσειρά1" style:family="text"/>
    <style:style style:name="Επικεφαλίδα_20_8_20_Char" style:display-name="Επικεφαλίδα 8 Char" style:family="tex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Strong" style:family="text">
      <style:text-properties fo:font-weight="bold" style:font-weight-asian="bold" style:font-weight-complex="bold"/>
    </style:style>
    <style:style style:name="Emphasis" style:family="text">
      <style:text-properties fo:font-style="normal" fo:font-weight="bold" style:font-style-asian="normal" style:font-weight-asian="bold" style:font-style-complex="normal" style:font-weight-complex="bold"/>
    </style:style>
    <style:style style:name="Σώμα_20_κειμένου_20_Char" style:display-name="Σώμα κειμένου Char" style:family="text">
      <style:text-properties style:font-name="Tahoma" fo:font-family="Tahoma" style:font-family-generic="roman" style:font-pitch="variable" fo:font-weight="bold" style:font-name-asian="Times New Roman1" style:font-family-asian="'Times New Roman'" style:font-family-generic-asian="system" style:font-pitch-asian="variable" style:font-weight-asian="bold" style:font-name-complex="Tahoma1" style:font-family-complex="Tahoma" style:font-family-generic-complex="system" style:font-pitch-complex="variable" style:font-size-complex="12pt" style:font-weight-complex="bold"/>
    </style:style>
    <style:style style:name="Κείμενο_20_πλαισίου_20_Char" style:display-name="Κείμενο πλαισίου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Κεφαλίδα_20_Char" style:display-name="Κεφαλίδα Char" style:family="text">
      <style:text-properties fo:font-size="11pt" style:font-size-asian="11pt" style:font-size-complex="11pt"/>
    </style:style>
    <style:style style:name="Υποσέλιδο_20_Char" style:display-name="Υποσέλιδο Char" style:family="text">
      <style:text-properties fo:font-size="11pt" style:font-size-asian="11pt" style:font-size-complex="11pt"/>
    </style:style>
    <style:style style:name="page_20_number" style:display-name="page number" style:family="text" style:parent-style-name="Default_20_Paragraph_20_Font">
      <style:text-properties fo:language="el" fo:country="G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1pt" style:font-style-complex="normal" style:font-weight-complex="normal"/>
    </style:style>
    <style:style style:name="ListLabel_20_1" style:display-name="ListLabel 1" style:family="text">
      <style:text-properties fo:color="#00000a"/>
    </style:style>
    <style:style style:name="ListLabel_20_2" style:display-name="ListLabel 2" style:family="text">
      <style:text-properties fo:font-size="8pt" fo:font-weight="normal" style:font-name-asian="Arial Unicode MS" style:font-family-asian="'Arial Unicode MS'" style:font-family-generic-asian="system" style:font-pitch-asian="variable" style:font-size-asian="8pt" style:font-weight-asian="normal" style:font-name-complex="Arial2" style:font-family-complex="Arial" style:font-family-generic-complex="system" style:font-pitch-complex="variable" style:font-size-complex="8pt"/>
    </style:style>
    <style:style style:name="ListLabel_20_3" style:display-name="ListLabel 3"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0pt" fo:font-weight="normal" style:font-name-asian="Arial Unicode MS" style:font-family-asian="'Arial Unicode MS'" style:font-family-generic-asian="system" style:font-pitch-asian="variable" style:font-size-asian="10pt" style:font-weight-asian="normal" style:font-name-complex="Arial2" style:font-family-complex="Arial"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769cm" fo:text-indent="-0.635cm" fo:margin-left="0.76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039cm"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309cm"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579cm" fo:text-indent="-0.635cm" fo:margin-left="4.579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5.849cm"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119cm"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389cm" fo:text-indent="-0.635cm" fo:margin-left="8.3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9.659cm"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929cm"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9.9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11.1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12.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13.7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4.9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6.2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7.5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8.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0.769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579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3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en" fo:country="US"/>
    </style:style>
    <style:style style:name="MT2" style:family="text">
      <style:text-properties fo:language="en" fo:country="US" officeooo:rsid="0019b0cf" fo:background-color="#00ffff" loext:char-shading-value="0"/>
    </style:style>
    <style:style style:name="MT3" style:family="text">
      <style:text-properties fo:language="en" fo:country="US" officeooo:rsid="00ab81fd" fo:background-color="#00ffff" loext:char-shading-value="0"/>
    </style:style>
    <style:style style:name="MT4" style:family="text">
      <style:text-properties fo:font-size="12pt" fo:font-weight="bold" style:font-size-asian="12pt" style:font-weight-asian="bold" style:font-size-complex="12pt"/>
    </style:style>
    <style:style style:name="Mfr1" style:family="graphic" style:parent-style-name="Graphics">
      <style:graphic-properties fo:margin-left="0cm" fo:margin-right="0cm" fo:margin-top="0cm" fo:margin-bottom="0cm" style:vertical-pos="top" style:vertical-rel="baseline" draw:fill-image-width="0cm" draw:fill-image-height="0cm" fo:padding="0cm" fo:border="none" style:shadow="none" draw:shadow-opacity="100%" style:mirror="none" fo:clip="rect(0cm, 0.051cm, 0cm, 0cm)" draw:luminance="0%" draw:contrast="0%" draw:red="0%" draw:green="0%" draw:blue="0%" draw:gamma="100%" draw:color-inversion="false" draw:image-opacity="100%" draw:color-mode="standard"/>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draw:fill="none" draw:fill-color="#ffffff" fo:padding="0cm" fo:border="none" style:shadow="none" draw:shadow-opacity="100%">
        <style:columns fo:column-count="1" fo:column-gap="0cm"/>
      </style:graphic-properties>
    </style:style>
    <style:page-layout style:name="Mpm1">
      <style:page-layout-properties fo:page-width="21.001cm" fo:page-height="29.7cm" style:num-format="1" style:print-orientation="portrait" fo:margin-top="1cm" fo:margin-bottom="1.251cm" fo:margin-left="1.499cm" fo:margin-right="1.499cm" fo:background-color="#ffffff"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6cm" fo:margin-left="0cm" fo:margin-right="0cm" fo:margin-bottom="1.499cm" style:dynamic-spacing="true"/>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141"/><text:span text:style-name="MT1"><text:s text:c="2"/></text:span><text:s/><text:span text:style-name="MT1"><text:s text:c="18"/></text:span><text:span text:style-name="MT2">22 Ιανουαρίου 201</text:span><text:span text:style-name="MT3">6</text:span></text:p>
      </style:header>
      <style:footer>
        <text:p text:style-name="MP1"><draw:frame draw:style-name="Mfr1" draw:name="Εικόνα 1" text:anchor-type="as-char" svg:width="16.316cm" svg:height="1.956cm" draw:z-index="25"><draw:image xlink:href="Pictures/10000000000003A60000007D0BF35FA6AF05F9AA.png" xlink:type="simple" xlink:show="embed" xlink:actuate="onLoad"/></draw:frame><draw:frame draw:style-name="Mfr2" draw:name="Πλαίσιο1" text:anchor-type="char" svg:x="17.697cm" svg:y="1.741cm" svg:width="1.545cm" svg:height="1.326cm" draw:z-index="12"><draw:text-box><text:p text:style-name="Frame_20_contents"><text:s text:c="4"/><text:span text:style-name="page_20_number"><text:span text:style-name="MT4"><text:page-number text:select-page="current">13</text:page-number></text:span></text:span></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Μαράκι</meta:initial-creator>
    <meta:editing-cycles>327</meta:editing-cycles>
    <meta:print-date>2015-01-02T12:36:00</meta:print-date>
    <meta:creation-date>2015-01-22T07:51:00</meta:creation-date>
    <dc:date>2017-01-15T21:09:38.691670417</dc:date>
    <meta:editing-duration>PT13H25M52S</meta:editing-duration>
    <meta:generator>LibreOffice/5.2.4.2.1$Linux_X86_64 LibreOffice_project/20m0$Build-2</meta:generator>
    <dc:creator>Theodore Lytras</dc:creator>
    <meta:document-statistic meta:table-count="1" meta:image-count="2" meta:object-count="0" meta:page-count="13" meta:paragraph-count="131" meta:word-count="2211" meta:character-count="20658" meta:non-whitespace-character-count="1838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